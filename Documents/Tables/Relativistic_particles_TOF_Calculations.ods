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2.3807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2.3591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1.539in"/>
    </style:style>
    <style:style style:name="co8" style:family="table-column">
      <style:table-column-properties fo:break-before="auto" style:column-width="1.3055in"/>
    </style:style>
    <style:style style:name="co9" style:family="table-column">
      <style:table-column-properties fo:break-before="auto" style:column-width="1.709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erif" style:font-name-asian="DejaVu Sans" style:font-name-complex="Noto Sans Arab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30"/>
    <style:style style:name="ce6" style:family="table-cell" style:parent-style-name="Default" style:data-style-name="N130"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133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5343in" svg:height="7.4079in" svg:x="21.6181in" svg:y="8.2094in">
            <draw:object draw:notify-on-update-of-ranges="Sheet1.A48:Sheet1.A88 Sheet1.G47:Sheet1.G47 Sheet1.G48:Sheet1.G88 Sheet1.A48:Sheet1.A88 Sheet1.H47:Sheet1.H47 Sheet1.H48:Sheet1.H88 Sheet1.A48:Sheet1.A88 Sheet1.I47:Sheet1.I47 Sheet1.I48:Sheet1.I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 = gamma * m * c^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 = E – m*c^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a = v / 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mma = 1 / sqrt (1 – beta^2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onstants</text:p>
          </table:table-cell>
          <table:table-cell/>
          <table:table-cell table:style-name="ce1" office:value-type="string" calcext:value-type="string">
            <text:p>U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_n (neutron rest mass)</text:p>
          </table:table-cell>
          <table:table-cell table:style-name="ce3" office:value-type="float" office:value="939.565" calcext:value-type="float">
            <text:p>939.57</text:p>
          </table:table-cell>
          <table:table-cell office:value-type="string" calcext:value-type="string">
            <text:p>Me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 (speed of light)</text:p>
          </table:table-cell>
          <table:table-cell table:style-name="ce3" table:formula="of:=299792458*100/1000000000" office:value-type="float" office:value="29.9792458" calcext:value-type="float">
            <text:p>29.98</text:p>
          </table:table-cell>
          <table:table-cell office:value-type="string" calcext:value-type="string">
            <text:p>cm / 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get cell end to detector face</text:p>
          </table:table-cell>
          <table:table-cell table:style-name="ce4" table:formula="of:=3.376*100" office:value-type="float" office:value="337.6" calcext:value-type="float">
            <text:p>337.6</text:p>
          </table:table-cell>
          <table:table-cell office:value-type="string" calcext:value-type="string">
            <text:p>c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thium target in the cell</text:p>
          </table:table-cell>
          <table:table-cell table:style-name="ce4" office:value-type="float" office:value="4.5" calcext:value-type="float">
            <text:p>4.5</text:p>
          </table:table-cell>
          <table:table-cell office:value-type="string" calcext:value-type="string">
            <text:p>c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tector length</text:p>
          </table:table-cell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cm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eutron energy</text:p>
          </table:table-cell>
          <table:table-cell table:style-name="Default" office:value-type="string" calcext:value-type="string">
            <text:p>gamma (lorenz factor)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F (neutrons) at the face of detector</text:p>
          </table:table-cell>
          <table:table-cell office:value-type="string" calcext:value-type="string">
            <text:p>TOF (neutrons) at the end of detector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1+[.A14]/[.$B$7]" office:value-type="float" office:value="1.01064322319371" calcext:value-type="float">
            <text:p>1.0106</text:p>
          </table:table-cell>
          <table:table-cell table:formula="of:=SQRT(1-1/[.B14]^2)" office:value-type="float" office:value="0.144745884286431" calcext:value-type="float">
            <text:p>0.144745884286431</text:p>
          </table:table-cell>
          <table:table-cell table:formula="of:=[.C14]*[.$B$8]" office:value-type="float" office:value="4.33937244356128" calcext:value-type="float">
            <text:p>4.33937244356128</text:p>
          </table:table-cell>
          <table:table-cell table:formula="of:=([.$B$9]+[.$B$10])/[.D14]" office:value-type="float" office:value="78.8362843819974" calcext:value-type="float">
            <text:p>78.8362843819974</text:p>
          </table:table-cell>
          <table:table-cell table:formula="of:=([.$B$9]+[.$B$10]+[.$B$11])/[.D14]" office:value-type="float" office:value="89.2064474839848" calcext:value-type="float">
            <text:p>89.206447483984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1+[.A15]/[.$B$7]" office:value-type="float" office:value="1.01170754551308" calcext:value-type="float">
            <text:p>1.0117</text:p>
          </table:table-cell>
          <table:table-cell table:formula="of:=SQRT(1-1/[.B15]^2)" office:value-type="float" office:value="0.151691190847822" calcext:value-type="float">
            <text:p>0.151691190847822</text:p>
          </table:table-cell>
          <table:table-cell table:formula="of:=[.C15]*[.$B$8]" office:value-type="float" office:value="4.54758749612157" calcext:value-type="float">
            <text:p>4.54758749612157</text:p>
          </table:table-cell>
          <table:table-cell table:formula="of:=([.$B$9]+[.$B$10])/[.D15]" office:value-type="float" office:value="75.2266999352429" calcext:value-type="float">
            <text:p>75.2266999352429</text:p>
          </table:table-cell>
          <table:table-cell table:formula="of:=([.$B$9]+[.$B$10]+[.$B$11])/[.D15]" office:value-type="float" office:value="85.1220565475958" calcext:value-type="float">
            <text:p>85.122056547595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1+[.A16]/[.$B$7]" office:value-type="float" office:value="1.01277186783245" calcext:value-type="float">
            <text:p>1.0128</text:p>
          </table:table-cell>
          <table:table-cell table:formula="of:=SQRT(1-1/[.B16]^2)" office:value-type="float" office:value="0.158311642742762" calcext:value-type="float">
            <text:p>0.158311642742762</text:p>
          </table:table-cell>
          <table:table-cell table:formula="of:=[.C16]*[.$B$8]" office:value-type="float" office:value="4.74606365078703" calcext:value-type="float">
            <text:p>4.74606365078703</text:p>
          </table:table-cell>
          <table:table-cell table:formula="of:=([.$B$9]+[.$B$10])/[.D16]" office:value-type="float" office:value="72.0807863466538" calcext:value-type="float">
            <text:p>72.0807863466538</text:p>
          </table:table-cell>
          <table:table-cell table:formula="of:=([.$B$9]+[.$B$10]+[.$B$11])/[.D16]" office:value-type="float" office:value="81.5623279590462" calcext:value-type="float">
            <text:p>81.562327959046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1+[.A17]/[.$B$7]" office:value-type="float" office:value="1.01383619015183" calcext:value-type="float">
            <text:p>1.0138</text:p>
          </table:table-cell>
          <table:table-cell table:formula="of:=SQRT(1-1/[.B17]^2)" office:value-type="float" office:value="0.164646514652215" calcext:value-type="float">
            <text:p>0.164646514652215</text:p>
          </table:table-cell>
          <table:table-cell table:formula="of:=[.C17]*[.$B$8]" office:value-type="float" office:value="4.93597833287205" calcext:value-type="float">
            <text:p>4.93597833287205</text:p>
          </table:table-cell>
          <table:table-cell table:formula="of:=([.$B$9]+[.$B$10])/[.D17]" office:value-type="float" office:value="69.3074355131834" calcext:value-type="float">
            <text:p>69.3074355131834</text:p>
          </table:table-cell>
          <table:table-cell table:formula="of:=([.$B$9]+[.$B$10]+[.$B$11])/[.D17]" office:value-type="float" office:value="78.4241692112052" calcext:value-type="float">
            <text:p>78.424169211205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1+[.A18]/[.$B$7]" office:value-type="float" office:value="1.0149005124712" calcext:value-type="float">
            <text:p>1.0149</text:p>
          </table:table-cell>
          <table:table-cell table:formula="of:=SQRT(1-1/[.B18]^2)" office:value-type="float" office:value="0.170727678317623" calcext:value-type="float">
            <text:p>0.170727678317623</text:p>
          </table:table-cell>
          <table:table-cell table:formula="of:=[.C18]*[.$B$8]" office:value-type="float" office:value="5.11828703314735" calcext:value-type="float">
            <text:p>5.11828703314735</text:p>
          </table:table-cell>
          <table:table-cell table:formula="of:=([.$B$9]+[.$B$10])/[.D18]" office:value-type="float" office:value="66.8387680848049" calcext:value-type="float">
            <text:p>66.8387680848049</text:p>
          </table:table-cell>
          <table:table-cell table:formula="of:=([.$B$9]+[.$B$10]+[.$B$11])/[.D18]" office:value-type="float" office:value="75.6307720714059" calcext:value-type="float">
            <text:p>75.630772071405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1+[.A19]/[.$B$7]" office:value-type="float" office:value="1.01596483479057" calcext:value-type="float">
            <text:p>1.0160</text:p>
          </table:table-cell>
          <table:table-cell table:formula="of:=SQRT(1-1/[.B19]^2)" office:value-type="float" office:value="0.17658142382835" calcext:value-type="float">
            <text:p>0.17658142382835</text:p>
          </table:table-cell>
          <table:table-cell table:formula="of:=[.C19]*[.$B$8]" office:value-type="float" office:value="5.29377790866408" calcext:value-type="float">
            <text:p>5.29377790866408</text:p>
          </table:table-cell>
          <table:table-cell table:formula="of:=([.$B$9]+[.$B$10])/[.D19]" office:value-type="float" office:value="64.6230359305593" calcext:value-type="float">
            <text:p>64.6230359305593</text:p>
          </table:table-cell>
          <table:table-cell table:formula="of:=([.$B$9]+[.$B$10]+[.$B$11])/[.D19]" office:value-type="float" office:value="73.1235814344329" calcext:value-type="float">
            <text:p>73.123581434432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1+[.A20]/[.$B$7]" office:value-type="float" office:value="1.01702915710994" calcext:value-type="float">
            <text:p>1.0170</text:p>
          </table:table-cell>
          <table:table-cell table:formula="of:=SQRT(1-1/[.B20]^2)" office:value-type="float" office:value="0.182229742035385" calcext:value-type="float">
            <text:p>0.182229742035385</text:p>
          </table:table-cell>
          <table:table-cell table:formula="of:=[.C20]*[.$B$8]" office:value-type="float" office:value="5.46311022854941" calcext:value-type="float">
            <text:p>5.46311022854941</text:p>
          </table:table-cell>
          <table:table-cell table:formula="of:=([.$B$9]+[.$B$10])/[.D20]" office:value-type="float" office:value="62.6200068620684" calcext:value-type="float">
            <text:p>62.6200068620684</text:p>
          </table:table-cell>
          <table:table-cell table:formula="of:=([.$B$9]+[.$B$10]+[.$B$11])/[.D20]" office:value-type="float" office:value="70.8570729503265" calcext:value-type="float">
            <text:p>70.857072950326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1+[.A21]/[.$B$7]" office:value-type="float" office:value="1.01809347942931" calcext:value-type="float">
            <text:p>1.0181</text:p>
          </table:table-cell>
          <table:table-cell table:formula="of:=SQRT(1-1/[.B21]^2)" office:value-type="float" office:value="0.187691251073153" calcext:value-type="float">
            <text:p>0.187691251073153</text:p>
          </table:table-cell>
          <table:table-cell table:formula="of:=[.C21]*[.$B$8]" office:value-type="float" office:value="5.62684215043157" calcext:value-type="float">
            <text:p>5.62684215043157</text:p>
          </table:table-cell>
          <table:table-cell table:formula="of:=([.$B$9]+[.$B$10])/[.D21]" office:value-type="float" office:value="60.7978668770301" calcext:value-type="float">
            <text:p>60.7978668770301</text:p>
          </table:table-cell>
          <table:table-cell table:formula="of:=([.$B$9]+[.$B$10]+[.$B$11])/[.D21]" office:value-type="float" office:value="68.7952477874842" calcext:value-type="float">
            <text:p>68.795247787484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1+[.A22]/[.$B$7]" office:value-type="float" office:value="1.01915780174868" calcext:value-type="float">
            <text:p>1.0192</text:p>
          </table:table-cell>
          <table:table-cell table:formula="of:=SQRT(1-1/[.B22]^2)" office:value-type="float" office:value="0.192981880771325" calcext:value-type="float">
            <text:p>0.192981880771325</text:p>
          </table:table-cell>
          <table:table-cell table:formula="of:=[.C22]*[.$B$8]" office:value-type="float" office:value="5.78545123858984" calcext:value-type="float">
            <text:p>5.78545123858984</text:p>
          </table:table-cell>
          <table:table-cell table:formula="of:=([.$B$9]+[.$B$10])/[.D22]" office:value-type="float" office:value="59.1310834525994" calcext:value-type="float">
            <text:p>59.1310834525994</text:p>
          </table:table-cell>
          <table:table-cell table:formula="of:=([.$B$9]+[.$B$10]+[.$B$11])/[.D22]" office:value-type="float" office:value="66.9092148626168" calcext:value-type="float">
            <text:p>66.909214862616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1+[.A23]/[.$B$7]" office:value-type="float" office:value="1.02022212406805" calcext:value-type="float">
            <text:p>1.0202</text:p>
          </table:table-cell>
          <table:table-cell table:formula="of:=SQRT(1-1/[.B23]^2)" office:value-type="float" office:value="0.198115388088172" calcext:value-type="float">
            <text:p>0.198115388088172</text:p>
          </table:table-cell>
          <table:table-cell table:formula="of:=[.C23]*[.$B$8]" office:value-type="float" office:value="5.93934991625769" calcext:value-type="float">
            <text:p>5.93934991625769</text:p>
          </table:table-cell>
          <table:table-cell table:formula="of:=([.$B$9]+[.$B$10])/[.D23]" office:value-type="float" office:value="57.598896314153" calcext:value-type="float">
            <text:p>57.598896314153</text:p>
          </table:table-cell>
          <table:table-cell table:formula="of:=([.$B$9]+[.$B$10]+[.$B$11])/[.D23]" office:value-type="float" office:value="65.1754830845034" calcext:value-type="float">
            <text:p>65.175483084503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1+[.A24]/[.$B$7]" office:value-type="float" office:value="1.02128644638742" calcext:value-type="float">
            <text:p>1.0213</text:p>
          </table:table-cell>
          <table:table-cell table:formula="of:=SQRT(1-1/[.B24]^2)" office:value-type="float" office:value="0.203103751937293" calcext:value-type="float">
            <text:p>0.203103751937293</text:p>
          </table:table-cell>
          <table:table-cell table:formula="of:=[.C24]*[.$B$8]" office:value-type="float" office:value="6.08889730223034" calcext:value-type="float">
            <text:p>6.08889730223034</text:p>
          </table:table-cell>
          <table:table-cell table:formula="of:=([.$B$9]+[.$B$10])/[.D24]" office:value-type="float" office:value="56.1842289366073" calcext:value-type="float">
            <text:p>56.1842289366073</text:p>
          </table:table-cell>
          <table:table-cell table:formula="of:=([.$B$9]+[.$B$10]+[.$B$11])/[.D24]" office:value-type="float" office:value="63.5747296736647" calcext:value-type="float">
            <text:p>63.574729673664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1+[.A25]/[.$B$7]" office:value-type="float" office:value="1.0223507687068" calcext:value-type="float">
            <text:p>1.0224</text:p>
          </table:table-cell>
          <table:table-cell table:formula="of:=SQRT(1-1/[.B25]^2)" office:value-type="float" office:value="0.207957480217161" calcext:value-type="float">
            <text:p>0.207957480217161</text:p>
          </table:table-cell>
          <table:table-cell table:formula="of:=[.C25]*[.$B$8]" office:value-type="float" office:value="6.2344084153789" calcext:value-type="float">
            <text:p>6.2344084153789</text:p>
          </table:table-cell>
          <table:table-cell table:formula="of:=([.$B$9]+[.$B$10])/[.D25]" office:value-type="float" office:value="54.8728888463764" calcext:value-type="float">
            <text:p>54.8728888463764</text:p>
          </table:table-cell>
          <table:table-cell table:formula="of:=([.$B$9]+[.$B$10]+[.$B$11])/[.D25]" office:value-type="float" office:value="62.0908952716525" calcext:value-type="float">
            <text:p>62.090895271652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1+[.A26]/[.$B$7]" office:value-type="float" office:value="1.02341509102617" calcext:value-type="float">
            <text:p>1.0234</text:p>
          </table:table-cell>
          <table:table-cell table:formula="of:=SQRT(1-1/[.B26]^2)" office:value-type="float" office:value="0.212685851796866" calcext:value-type="float">
            <text:p>0.212685851796866</text:p>
          </table:table-cell>
          <table:table-cell table:formula="of:=[.C26]*[.$B$8]" office:value-type="float" office:value="6.37616142920062" calcext:value-type="float">
            <text:p>6.37616142920062</text:p>
          </table:table-cell>
          <table:table-cell table:formula="of:=([.$B$9]+[.$B$10])/[.D26]" office:value-type="float" office:value="53.6529703331067" calcext:value-type="float">
            <text:p>53.6529703331067</text:p>
          </table:table-cell>
          <table:table-cell table:formula="of:=([.$B$9]+[.$B$10]+[.$B$11])/[.D26]" office:value-type="float" office:value="60.7105080851962" calcext:value-type="float">
            <text:p>60.710508085196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1+[.A27]/[.$B$7]" office:value-type="float" office:value="1.02447941334554" calcext:value-type="float">
            <text:p>1.0245</text:p>
          </table:table-cell>
          <table:table-cell table:formula="of:=SQRT(1-1/[.B27]^2)" office:value-type="float" office:value="0.217297109553956" calcext:value-type="float">
            <text:p>0.217297109553956</text:p>
          </table:table-cell>
          <table:table-cell table:formula="of:=[.C27]*[.$B$8]" office:value-type="float" office:value="6.51440345894757" calcext:value-type="float">
            <text:p>6.51440345894757</text:p>
          </table:table-cell>
          <table:table-cell table:formula="of:=([.$B$9]+[.$B$10])/[.D27]" office:value-type="float" office:value="52.5144016878666" calcext:value-type="float">
            <text:p>52.5144016878666</text:p>
          </table:table-cell>
          <table:table-cell table:formula="of:=([.$B$9]+[.$B$10]+[.$B$11])/[.D27]" office:value-type="float" office:value="59.4221715678841" calcext:value-type="float">
            <text:p>59.422171567884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1+[.A28]/[.$B$7]" office:value-type="float" office:value="1.02554373566491" calcext:value-type="float">
            <text:p>1.0255</text:p>
          </table:table-cell>
          <table:table-cell table:formula="of:=SQRT(1-1/[.B28]^2)" office:value-type="float" office:value="0.221798616052273" calcext:value-type="float">
            <text:p>0.221798616052273</text:p>
          </table:table-cell>
          <table:table-cell table:formula="of:=[.C28]*[.$B$8]" office:value-type="float" office:value="6.64935522873091" calcext:value-type="float">
            <text:p>6.64935522873091</text:p>
          </table:table-cell>
          <table:table-cell table:formula="of:=([.$B$9]+[.$B$10])/[.D28]" office:value-type="float" office:value="51.448597380064" calcext:value-type="float">
            <text:p>51.448597380064</text:p>
          </table:table-cell>
          <table:table-cell table:formula="of:=([.$B$9]+[.$B$10]+[.$B$11])/[.D28]" office:value-type="float" office:value="58.2161708442642" calcext:value-type="float">
            <text:p>58.216170844264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1+[.A29]/[.$B$7]" office:value-type="float" office:value="1.02660805798428" calcext:value-type="float">
            <text:p>1.0266</text:p>
          </table:table-cell>
          <table:table-cell table:formula="of:=SQRT(1-1/[.B29]^2)" office:value-type="float" office:value="0.226196980339191" calcext:value-type="float">
            <text:p>0.226196980339191</text:p>
          </table:table-cell>
          <table:table-cell table:formula="of:=[.C29]*[.$B$8]" office:value-type="float" office:value="6.78121487280638" calcext:value-type="float">
            <text:p>6.78121487280638</text:p>
          </table:table-cell>
          <table:table-cell table:formula="of:=([.$B$9]+[.$B$10])/[.D29]" office:value-type="float" office:value="50.4481875912632" calcext:value-type="float">
            <text:p>50.4481875912632</text:p>
          </table:table-cell>
          <table:table-cell table:formula="of:=([.$B$9]+[.$B$10]+[.$B$11])/[.D29]" office:value-type="float" office:value="57.0841666664074" calcext:value-type="float">
            <text:p>57.084166666407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1+[.A30]/[.$B$7]" office:value-type="float" office:value="1.02767238030365" calcext:value-type="float">
            <text:p>1.0277</text:p>
          </table:table-cell>
          <table:table-cell table:formula="of:=SQRT(1-1/[.B30]^2)" office:value-type="float" office:value="0.23049816215569" calcext:value-type="float">
            <text:p>0.23049816215569</text:p>
          </table:table-cell>
          <table:table-cell table:formula="of:=[.C30]*[.$B$8]" office:value-type="float" office:value="6.9101610597137" calcext:value-type="float">
            <text:p>6.9101610597137</text:p>
          </table:table-cell>
          <table:table-cell table:formula="of:=([.$B$9]+[.$B$10])/[.D30]" office:value-type="float" office:value="49.5068055641201" calcext:value-type="float">
            <text:p>49.5068055641201</text:p>
          </table:table-cell>
          <table:table-cell table:formula="of:=([.$B$9]+[.$B$10]+[.$B$11])/[.D30]" office:value-type="float" office:value="56.0189547906193" calcext:value-type="float">
            <text:p>56.018954790619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1+[.A31]/[.$B$7]" office:value-type="float" office:value="1.02873670262302" calcext:value-type="float">
            <text:p>1.0287</text:p>
          </table:table-cell>
          <table:table-cell table:formula="of:=SQRT(1-1/[.B31]^2)" office:value-type="float" office:value="0.234707558293222" calcext:value-type="float">
            <text:p>0.234707558293222</text:p>
          </table:table-cell>
          <table:table-cell table:formula="of:=[.C31]*[.$B$8]" office:value-type="float" office:value="7.03635558119034" calcext:value-type="float">
            <text:p>7.03635558119034</text:p>
          </table:table-cell>
          <table:table-cell table:formula="of:=([.$B$9]+[.$B$10])/[.D31]" office:value-type="float" office:value="48.6189187076482" calcext:value-type="float">
            <text:p>48.6189187076482</text:p>
          </table:table-cell>
          <table:table-cell table:formula="of:=([.$B$9]+[.$B$10]+[.$B$11])/[.D31]" office:value-type="float" office:value="55.0142748662105" calcext:value-type="float">
            <text:p>55.014274866210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1+[.A32]/[.$B$7]" office:value-type="float" office:value="1.02980102494239" calcext:value-type="float">
            <text:p>1.0298</text:p>
          </table:table-cell>
          <table:table-cell table:formula="of:=SQRT(1-1/[.B32]^2)" office:value-type="float" office:value="0.238830074701255" calcext:value-type="float">
            <text:p>0.238830074701255</text:p>
          </table:table-cell>
          <table:table-cell table:formula="of:=[.C32]*[.$B$8]" office:value-type="float" office:value="7.1599455139013" calcext:value-type="float">
            <text:p>7.1599455139013</text:p>
          </table:table-cell>
          <table:table-cell table:formula="of:=([.$B$9]+[.$B$10])/[.D32]" office:value-type="float" office:value="47.7796932023854" calcext:value-type="float">
            <text:p>47.7796932023854</text:p>
          </table:table-cell>
          <table:table-cell table:formula="of:=([.$B$9]+[.$B$10]+[.$B$11])/[.D32]" office:value-type="float" office:value="54.0646572307612" calcext:value-type="float">
            <text:p>54.064657230761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1+[.A33]/[.$B$7]" office:value-type="float" office:value="1.03086534726176" calcext:value-type="float">
            <text:p>1.0309</text:p>
          </table:table-cell>
          <table:table-cell table:formula="of:=SQRT(1-1/[.B33]^2)" office:value-type="float" office:value="0.242870187119692" calcext:value-type="float">
            <text:p>0.242870187119692</text:p>
          </table:table-cell>
          <table:table-cell table:formula="of:=[.C33]*[.$B$8]" office:value-type="float" office:value="7.28106503715326" calcext:value-type="float">
            <text:p>7.28106503715326</text:p>
          </table:table-cell>
          <table:table-cell table:formula="of:=([.$B$9]+[.$B$10])/[.D33]" office:value-type="float" office:value="46.9848845264201" calcext:value-type="float">
            <text:p>46.9848845264201</text:p>
          </table:table-cell>
          <table:table-cell table:formula="of:=([.$B$9]+[.$B$10]+[.$B$11])/[.D33]" office:value-type="float" office:value="53.1652990358878" calcext:value-type="float">
            <text:p>53.1652990358878</text:p>
          </table:table-cell>
          <table:table-cell table:number-columns-repeated="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6" table:formula="of:=1+[.A34]/[.$B$7]" office:value-type="float" office:value="1.03192966958114" calcext:value-type="float">
            <text:p>1.0319</text:p>
          </table:table-cell>
          <table:table-cell table:style-name="ce1" table:formula="of:=SQRT(1-1/[.B34]^2)" office:value-type="float" office:value="0.24683199239359" calcext:value-type="float">
            <text:p>0.24683199239359</text:p>
          </table:table-cell>
          <table:table-cell table:style-name="ce1" table:formula="of:=[.C34]*[.$B$8]" office:value-type="float" office:value="7.39983697127117" calcext:value-type="float">
            <text:p>7.39983697127117</text:p>
          </table:table-cell>
          <table:table-cell table:style-name="ce1" table:formula="of:=([.$B$9]+[.$B$10])/[.D34]" office:value-type="float" office:value="46.230748235151" calcext:value-type="float">
            <text:p>46.230748235151</text:p>
          </table:table-cell>
          <table:table-cell table:style-name="ce1" table:formula="of:=([.$B$9]+[.$B$10]+[.$B$11])/[.D34]" office:value-type="float" office:value="52.3119632909294" calcext:value-type="float">
            <text:p>52.311963290929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1+[.A35]/[.$B$7]" office:value-type="float" office:value="1.03299399190051" calcext:value-type="float">
            <text:p>1.0330</text:p>
          </table:table-cell>
          <table:table-cell table:formula="of:=SQRT(1-1/[.B35]^2)" office:value-type="float" office:value="0.250719252163764" calcext:value-type="float">
            <text:p>0.250719252163764</text:p>
          </table:table-cell>
          <table:table-cell table:formula="of:=[.C35]*[.$B$8]" office:value-type="float" office:value="7.51637408740967" calcext:value-type="float">
            <text:p>7.51637408740967</text:p>
          </table:table-cell>
          <table:table-cell table:formula="of:=([.$B$9]+[.$B$10])/[.D35]" office:value-type="float" office:value="45.5139667107623" calcext:value-type="float">
            <text:p>45.5139667107623</text:p>
          </table:table-cell>
          <table:table-cell table:formula="of:=([.$B$9]+[.$B$10]+[.$B$11])/[.D35]" office:value-type="float" office:value="51.5008959770128" calcext:value-type="float">
            <text:p>51.500895977012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1+[.A36]/[.$B$7]" office:value-type="float" office:value="1.03405831421988" calcext:value-type="float">
            <text:p>1.0341</text:p>
          </table:table-cell>
          <table:table-cell table:formula="of:=SQRT(1-1/[.B36]^2)" office:value-type="float" office:value="0.254535430274833" calcext:value-type="float">
            <text:p>0.254535430274833</text:p>
          </table:table-cell>
          <table:table-cell table:formula="of:=[.C36]*[.$B$8]" office:value-type="float" office:value="7.63078022901798" calcext:value-type="float">
            <text:p>7.63078022901798</text:p>
          </table:table-cell>
          <table:table-cell table:formula="of:=([.$B$9]+[.$B$10])/[.D36]" office:value-type="float" office:value="44.8315886099141" calcext:value-type="float">
            <text:p>44.8315886099141</text:p>
          </table:table-cell>
          <table:table-cell table:formula="of:=([.$B$9]+[.$B$10]+[.$B$11])/[.D36]" office:value-type="float" office:value="50.7287575296631" calcext:value-type="float">
            <text:p>50.728757529663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1+[.A37]/[.$B$7]" office:value-type="float" office:value="1.03512263653925" calcext:value-type="float">
            <text:p>1.0351</text:p>
          </table:table-cell>
          <table:table-cell table:formula="of:=SQRT(1-1/[.B37]^2)" office:value-type="float" office:value="0.258283724971425" calcext:value-type="float">
            <text:p>0.258283724971425</text:p>
          </table:table-cell>
          <table:table-cell table:formula="of:=[.C37]*[.$B$8]" office:value-type="float" office:value="7.74315127705794" calcext:value-type="float">
            <text:p>7.74315127705794</text:p>
          </table:table-cell>
          <table:table-cell table:formula="of:=([.$B$9]+[.$B$10])/[.D37]" office:value-type="float" office:value="44.1809784878675" calcext:value-type="float">
            <text:p>44.1809784878675</text:p>
          </table:table-cell>
          <table:table-cell table:formula="of:=([.$B$9]+[.$B$10]+[.$B$11])/[.D37]" office:value-type="float" office:value="49.9925658364615" calcext:value-type="float">
            <text:p>49.992565836461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1+[.A38]/[.$B$7]" office:value-type="float" office:value="1.03618695885862" calcext:value-type="float">
            <text:p>1.0362</text:p>
          </table:table-cell>
          <table:table-cell table:formula="of:=SQRT(1-1/[.B38]^2)" office:value-type="float" office:value="0.261967096744176" calcext:value-type="float">
            <text:p>0.261967096744176</text:p>
          </table:table-cell>
          <table:table-cell table:formula="of:=[.C38]*[.$B$8]" office:value-type="float" office:value="7.85357598480604" calcext:value-type="float">
            <text:p>7.85357598480604</text:p>
          </table:table-cell>
          <table:table-cell table:formula="of:=([.$B$9]+[.$B$10])/[.D38]" office:value-type="float" office:value="43.5597746379287" calcext:value-type="float">
            <text:p>43.5597746379287</text:p>
          </table:table-cell>
          <table:table-cell table:formula="of:=([.$B$9]+[.$B$10]+[.$B$11])/[.D38]" office:value-type="float" office:value="49.28964853067" calcext:value-type="float">
            <text:p>49.2896485306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1+[.A39]/[.$B$7]" office:value-type="float" office:value="1.03725128117799" calcext:value-type="float">
            <text:p>1.0373</text:p>
          </table:table-cell>
          <table:table-cell table:formula="of:=SQRT(1-1/[.B39]^2)" office:value-type="float" office:value="0.265588292523681" calcext:value-type="float">
            <text:p>0.265588292523681</text:p>
          </table:table-cell>
          <table:table-cell table:formula="of:=[.C39]*[.$B$8]" office:value-type="float" office:value="7.96213670316975" calcext:value-type="float">
            <text:p>7.96213670316975</text:p>
          </table:table-cell>
          <table:table-cell table:formula="of:=([.$B$9]+[.$B$10])/[.D39]" office:value-type="float" office:value="42.9658536085934" calcext:value-type="float">
            <text:p>42.9658536085934</text:p>
          </table:table-cell>
          <table:table-cell table:formula="of:=([.$B$9]+[.$B$10]+[.$B$11])/[.D39]" office:value-type="float" office:value="48.6176028409427" calcext:value-type="float">
            <text:p>48.617602840942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1+[.A40]/[.$B$7]" office:value-type="float" office:value="1.03831560349736" calcext:value-type="float">
            <text:p>1.0383</text:p>
          </table:table-cell>
          <table:table-cell table:formula="of:=SQRT(1-1/[.B40]^2)" office:value-type="float" office:value="0.269149866791719" calcext:value-type="float">
            <text:p>0.269149866791719</text:p>
          </table:table-cell>
          <table:table-cell table:formula="of:=[.C40]*[.$B$8]" office:value-type="float" office:value="8.0689100135862" calcext:value-type="float">
            <text:p>8.0689100135862</text:p>
          </table:table-cell>
          <table:table-cell table:formula="of:=([.$B$9]+[.$B$10])/[.D40]" office:value-type="float" office:value="42.3973001835417" calcext:value-type="float">
            <text:p>42.3973001835417</text:p>
          </table:table-cell>
          <table:table-cell table:formula="of:=([.$B$9]+[.$B$10]+[.$B$11])/[.D40]" office:value-type="float" office:value="47.9742616224759" calcext:value-type="float">
            <text:p>47.974261622475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1+[.A41]/[.$B$7]" office:value-type="float" office:value="1.03937992581673" calcext:value-type="float">
            <text:p>1.0394</text:p>
          </table:table-cell>
          <table:table-cell table:formula="of:=SQRT(1-1/[.B41]^2)" office:value-type="float" office:value="0.272654200077064" calcext:value-type="float">
            <text:p>0.272654200077064</text:p>
          </table:table-cell>
          <table:table-cell table:formula="of:=[.C41]*[.$B$8]" office:value-type="float" office:value="8.17396728251267" calcext:value-type="float">
            <text:p>8.17396728251267</text:p>
          </table:table-cell>
          <table:table-cell table:formula="of:=([.$B$9]+[.$B$10])/[.D41]" office:value-type="float" office:value="41.8523818576918" calcext:value-type="float">
            <text:p>41.8523818576918</text:p>
          </table:table-cell>
          <table:table-cell table:formula="of:=([.$B$9]+[.$B$10]+[.$B$11])/[.D41]" office:value-type="float" office:value="47.3576644756285" calcext:value-type="float">
            <text:p>47.357664475628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1+[.A42]/[.$B$7]" office:value-type="float" office:value="1.04044424813611" calcext:value-type="float">
            <text:p>1.0404</text:p>
          </table:table-cell>
          <table:table-cell table:formula="of:=SQRT(1-1/[.B42]^2)" office:value-type="float" office:value="0.276103515221722" calcext:value-type="float">
            <text:p>0.276103515221722</text:p>
          </table:table-cell>
          <table:table-cell table:formula="of:=[.C42]*[.$B$8]" office:value-type="float" office:value="8.27737514907604" calcext:value-type="float">
            <text:p>8.27737514907604</text:p>
          </table:table-cell>
          <table:table-cell table:formula="of:=([.$B$9]+[.$B$10])/[.D42]" office:value-type="float" office:value="41.3295270346889" calcext:value-type="float">
            <text:p>41.3295270346889</text:p>
          </table:table-cell>
          <table:table-cell table:formula="of:=([.$B$9]+[.$B$10]+[.$B$11])/[.D42]" office:value-type="float" office:value="46.7660330754986" calcext:value-type="float">
            <text:p>46.766033075498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1+[.A43]/[.$B$7]" office:value-type="float" office:value="1.04150857045548" calcext:value-type="float">
            <text:p>1.0415</text:p>
          </table:table-cell>
          <table:table-cell table:formula="of:=SQRT(1-1/[.B43]^2)" office:value-type="float" office:value="0.279499891737645" calcext:value-type="float">
            <text:p>0.279499891737645</text:p>
          </table:table-cell>
          <table:table-cell table:formula="of:=[.C43]*[.$B$8]" office:value-type="float" office:value="8.37919595547625" calcext:value-type="float">
            <text:p>8.37919595547625</text:p>
          </table:table-cell>
          <table:table-cell table:formula="of:=([.$B$9]+[.$B$10])/[.D43]" office:value-type="float" office:value="40.8273063212491" calcext:value-type="float">
            <text:p>40.8273063212491</text:p>
          </table:table-cell>
          <table:table-cell table:formula="of:=([.$B$9]+[.$B$10]+[.$B$11])/[.D43]" office:value-type="float" office:value="46.1977500057162" calcext:value-type="float">
            <text:p>46.197750005716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1+[.A44]/[.$B$7]" office:value-type="float" office:value="1.04257289277485" calcext:value-type="float">
            <text:p>1.0426</text:p>
          </table:table-cell>
          <table:table-cell table:formula="of:=SQRT(1-1/[.B44]^2)" office:value-type="float" office:value="0.282845278521659" calcext:value-type="float">
            <text:p>0.282845278521659</text:p>
          </table:table-cell>
          <table:table-cell table:formula="of:=[.C44]*[.$B$8]" office:value-type="float" office:value="8.47948812817027" calcext:value-type="float">
            <text:p>8.47948812817027</text:p>
          </table:table-cell>
          <table:table-cell table:formula="of:=([.$B$9]+[.$B$10])/[.D44]" office:value-type="float" office:value="40.3444164115859" calcext:value-type="float">
            <text:p>40.3444164115859</text:p>
          </table:table-cell>
          <table:table-cell table:formula="of:=([.$B$9]+[.$B$10]+[.$B$11])/[.D44]" office:value-type="float" office:value="45.6513405230193" calcext:value-type="float">
            <text:p>45.6513405230193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Detector face distance (cm)</text:p>
          </table:table-cell>
          <table:table-cell table:style-name="ce7" office:value-type="string" calcext:value-type="string">
            <text:p>TOF 30 MeV neutrons (ns)</text:p>
          </table:table-cell>
          <table:table-cell table:style-name="ce1" office:value-type="string" calcext:value-type="string">
            <text:p>TOF 30 MeV neutrons det_end (ns)</text:p>
          </table:table-cell>
          <table:table-cell table:style-name="ce1" office:value-type="string" calcext:value-type="string">
            <text:p>TOF gammas det start (ns)</text:p>
          </table:table-cell>
          <table:table-cell table:style-name="ce1" office:value-type="string" calcext:value-type="string">
            <text:p>TOF gammas det end (ns)</text:p>
          </table:table-cell>
          <table:table-cell table:style-name="ce1" office:value-type="string" calcext:value-type="string">
            <text:p>delta TOF </text:p>
          </table:table-cell>
          <table:table-cell table:style-name="ce1" office:value-type="string" calcext:value-type="string">
            <text:p>Avg TOF Neutrons</text:p>
          </table:table-cell>
          <table:table-cell table:style-name="ce1" office:value-type="string" calcext:value-type="string">
            <text:p>Avg TOF Gammas</text:p>
          </table:table-cell>
          <table:table-cell table:style-name="ce1" office:value-type="string" calcext:value-type="string">
            <text:p>avg delta TOF</text:p>
          </table:table-cell>
          <table:table-cell office:value-type="string" calcext:value-type="string">
            <text:p>Modulo 4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[.A48]+[.$B$10])/[.$D$34]" office:value-type="float" office:value="34.3926495932357" calcext:value-type="float">
            <text:p>34.39</text:p>
          </table:table-cell>
          <table:table-cell table:formula="of:=([.A48]+[.$B$10]+[.$B$11])/[.$D$34]" office:value-type="float" office:value="40.4738646490141" calcext:value-type="float">
            <text:p>40.4738646490141</text:p>
          </table:table-cell>
          <table:table-cell table:formula="of:=([.A48]+[.$B$10])/[.$B$8]" office:value-type="float" office:value="8.48920622279297" calcext:value-type="float">
            <text:p>8.48920622279297</text:p>
          </table:table-cell>
          <table:table-cell table:formula="of:=([.A48]+[.$B$10]+[.$B$11])/[.$B$8]" office:value-type="float" office:value="9.99024465118465" calcext:value-type="float">
            <text:p>9.99024465118465</text:p>
          </table:table-cell>
          <table:table-cell table:formula="of:=([.C48]+[.B48]-[.E48]-[.D48])/2" office:value-type="float" office:value="28.1935316841361" calcext:value-type="float">
            <text:p>28.1935316841361</text:p>
          </table:table-cell>
          <table:table-cell table:formula="of:=([.C48]+[.B48])/2" office:value-type="float" office:value="37.4332571211249" calcext:value-type="float">
            <text:p>37.4332571211249</text:p>
          </table:table-cell>
          <table:table-cell table:formula="of:=([.D48]+[.E48])/2" office:value-type="float" office:value="9.23972543698881" calcext:value-type="float">
            <text:p>9.23972543698881</text:p>
          </table:table-cell>
          <table:table-cell table:style-name="ce8" table:formula="of:=[.G48]-[.H48]" office:value-type="float" office:value="28.1935316841361" calcext:value-type="float">
            <text:p>28.1935316841</text:p>
          </table:table-cell>
          <table:table-cell table:formula="of:=MOD([.I48];40)" office:value-type="float" office:value="28.1935316841361" calcext:value-type="float">
            <text:p>28.1935316841361</text:p>
          </table:table-cell>
          <table:table-cell table:formula="of:=40-[.J48]" office:value-type="float" office:value="11.8064683158639" calcext:value-type="float">
            <text:p>11.806468315863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[.A49]+[.$B$10])/[.$D$34]" office:value-type="float" office:value="35.744030716742" calcext:value-type="float">
            <text:p>35.74</text:p>
          </table:table-cell>
          <table:table-cell table:formula="of:=([.A49]+[.$B$10]+[.$B$11])/[.$D$34]" office:value-type="float" office:value="41.8252457725205" calcext:value-type="float">
            <text:p>41.8252457725205</text:p>
          </table:table-cell>
          <table:table-cell table:formula="of:=([.A49]+[.$B$10])/[.$B$8]" office:value-type="float" office:value="8.82277031799112" calcext:value-type="float">
            <text:p>8.82277031799112</text:p>
          </table:table-cell>
          <table:table-cell table:formula="of:=([.A49]+[.$B$10]+[.$B$11])/[.$B$8]" office:value-type="float" office:value="10.3238087463828" calcext:value-type="float">
            <text:p>10.3238087463828</text:p>
          </table:table-cell>
          <table:table-cell table:formula="of:=([.C49]+[.B49]-[.E49]-[.D49])/2" office:value-type="float" office:value="29.2113487124443" calcext:value-type="float">
            <text:p>29.2113487124443</text:p>
          </table:table-cell>
          <table:table-cell table:formula="of:=([.C49]+[.B49])/2" office:value-type="float" office:value="38.7846382446312" calcext:value-type="float">
            <text:p>38.7846382446312</text:p>
          </table:table-cell>
          <table:table-cell table:formula="of:=([.D49]+[.E49])/2" office:value-type="float" office:value="9.57328953218696" calcext:value-type="float">
            <text:p>9.57328953218696</text:p>
          </table:table-cell>
          <table:table-cell table:style-name="ce8" table:formula="of:=[.G49]-[.H49]" office:value-type="float" office:value="29.2113487124443" calcext:value-type="float">
            <text:p>29.2113487124</text:p>
          </table:table-cell>
          <table:table-cell table:formula="of:=MOD([.I49];40)" office:value-type="float" office:value="29.2113487124443" calcext:value-type="float">
            <text:p>29.2113487124443</text:p>
          </table:table-cell>
          <table:table-cell table:formula="of:=40-[.J49]" office:value-type="float" office:value="10.7886512875557" calcext:value-type="float">
            <text:p>10.78865128755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[.A50]+[.$B$10])/[.$D$34]" office:value-type="float" office:value="37.0954118402483" calcext:value-type="float">
            <text:p>37.10</text:p>
          </table:table-cell>
          <table:table-cell table:formula="of:=([.A50]+[.$B$10]+[.$B$11])/[.$D$34]" office:value-type="float" office:value="43.1766268960268" calcext:value-type="float">
            <text:p>43.1766268960268</text:p>
          </table:table-cell>
          <table:table-cell table:formula="of:=([.A50]+[.$B$10])/[.$B$8]" office:value-type="float" office:value="9.15633441318927" calcext:value-type="float">
            <text:p>9.15633441318927</text:p>
          </table:table-cell>
          <table:table-cell table:formula="of:=([.A50]+[.$B$10]+[.$B$11])/[.$B$8]" office:value-type="float" office:value="10.657372841581" calcext:value-type="float">
            <text:p>10.657372841581</text:p>
          </table:table-cell>
          <table:table-cell table:formula="of:=([.C50]+[.B50]-[.E50]-[.D50])/2" office:value-type="float" office:value="30.2291657407524" calcext:value-type="float">
            <text:p>30.2291657407524</text:p>
          </table:table-cell>
          <table:table-cell table:formula="of:=([.C50]+[.B50])/2" office:value-type="float" office:value="40.1360193681375" calcext:value-type="float">
            <text:p>40.1360193681375</text:p>
          </table:table-cell>
          <table:table-cell table:formula="of:=([.D50]+[.E50])/2" office:value-type="float" office:value="9.90685362738512" calcext:value-type="float">
            <text:p>9.90685362738512</text:p>
          </table:table-cell>
          <table:table-cell table:style-name="ce8" table:formula="of:=[.G50]-[.H50]" office:value-type="float" office:value="30.2291657407524" calcext:value-type="float">
            <text:p>30.2291657408</text:p>
          </table:table-cell>
          <table:table-cell table:formula="of:=MOD([.I50];40)" office:value-type="float" office:value="30.2291657407524" calcext:value-type="float">
            <text:p>30.2291657407524</text:p>
          </table:table-cell>
          <table:table-cell table:formula="of:=40-[.J50]" office:value-type="float" office:value="9.7708342592476" calcext:value-type="float">
            <text:p>9.770834259247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[.A51]+[.$B$10])/[.$D$34]" office:value-type="float" office:value="38.4467929637546" calcext:value-type="float">
            <text:p>38.45</text:p>
          </table:table-cell>
          <table:table-cell table:formula="of:=([.A51]+[.$B$10]+[.$B$11])/[.$D$34]" office:value-type="float" office:value="44.5280080195331" calcext:value-type="float">
            <text:p>44.5280080195331</text:p>
          </table:table-cell>
          <table:table-cell table:formula="of:=([.A51]+[.$B$10])/[.$B$8]" office:value-type="float" office:value="9.48989850838743" calcext:value-type="float">
            <text:p>9.48989850838743</text:p>
          </table:table-cell>
          <table:table-cell table:formula="of:=([.A51]+[.$B$10]+[.$B$11])/[.$B$8]" office:value-type="float" office:value="10.9909369367791" calcext:value-type="float">
            <text:p>10.9909369367791</text:p>
          </table:table-cell>
          <table:table-cell table:formula="of:=([.C51]+[.B51]-[.E51]-[.D51])/2" office:value-type="float" office:value="31.2469827690606" calcext:value-type="float">
            <text:p>31.2469827690606</text:p>
          </table:table-cell>
          <table:table-cell table:formula="of:=([.C51]+[.B51])/2" office:value-type="float" office:value="41.4874004916438" calcext:value-type="float">
            <text:p>41.4874004916438</text:p>
          </table:table-cell>
          <table:table-cell table:formula="of:=([.D51]+[.E51])/2" office:value-type="float" office:value="10.2404177225833" calcext:value-type="float">
            <text:p>10.2404177225833</text:p>
          </table:table-cell>
          <table:table-cell table:style-name="ce8" table:formula="of:=[.G51]-[.H51]" office:value-type="float" office:value="31.2469827690606" calcext:value-type="float">
            <text:p>31.2469827691</text:p>
          </table:table-cell>
          <table:table-cell table:formula="of:=MOD([.I51];40)" office:value-type="float" office:value="31.2469827690606" calcext:value-type="float">
            <text:p>31.2469827690606</text:p>
          </table:table-cell>
          <table:table-cell table:formula="of:=40-[.J51]" office:value-type="float" office:value="8.7530172309394" calcext:value-type="float">
            <text:p>8.75301723093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[.A52]+[.$B$10])/[.$D$34]" office:value-type="float" office:value="39.798174087261" calcext:value-type="float">
            <text:p>39.80</text:p>
          </table:table-cell>
          <table:table-cell table:formula="of:=([.A52]+[.$B$10]+[.$B$11])/[.$D$34]" office:value-type="float" office:value="45.8793891430394" calcext:value-type="float">
            <text:p>45.8793891430394</text:p>
          </table:table-cell>
          <table:table-cell table:formula="of:=([.A52]+[.$B$10])/[.$B$8]" office:value-type="float" office:value="9.82346260358558" calcext:value-type="float">
            <text:p>9.82346260358558</text:p>
          </table:table-cell>
          <table:table-cell table:formula="of:=([.A52]+[.$B$10]+[.$B$11])/[.$B$8]" office:value-type="float" office:value="11.3245010319773" calcext:value-type="float">
            <text:p>11.3245010319773</text:p>
          </table:table-cell>
          <table:table-cell table:formula="of:=([.C52]+[.B52]-[.E52]-[.D52])/2" office:value-type="float" office:value="32.2647997973688" calcext:value-type="float">
            <text:p>32.2647997973688</text:p>
          </table:table-cell>
          <table:table-cell table:formula="of:=([.C52]+[.B52])/2" office:value-type="float" office:value="42.8387816151502" calcext:value-type="float">
            <text:p>42.8387816151502</text:p>
          </table:table-cell>
          <table:table-cell table:formula="of:=([.D52]+[.E52])/2" office:value-type="float" office:value="10.5739818177814" calcext:value-type="float">
            <text:p>10.5739818177814</text:p>
          </table:table-cell>
          <table:table-cell table:style-name="ce8" table:formula="of:=[.G52]-[.H52]" office:value-type="float" office:value="32.2647997973687" calcext:value-type="float">
            <text:p>32.2647997974</text:p>
          </table:table-cell>
          <table:table-cell table:formula="of:=MOD([.I52];40)" office:value-type="float" office:value="32.2647997973687" calcext:value-type="float">
            <text:p>32.2647997973687</text:p>
          </table:table-cell>
          <table:table-cell table:formula="of:=40-[.J52]" office:value-type="float" office:value="7.7352002026313" calcext:value-type="float">
            <text:p>7.73520020263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A53]+[.$B$10])/[.$D$34]" office:value-type="float" office:value="41.1495552107673" calcext:value-type="float">
            <text:p>41.15</text:p>
          </table:table-cell>
          <table:table-cell table:formula="of:=([.A53]+[.$B$10]+[.$B$11])/[.$D$34]" office:value-type="float" office:value="47.2307702665457" calcext:value-type="float">
            <text:p>47.2307702665457</text:p>
          </table:table-cell>
          <table:table-cell table:formula="of:=([.A53]+[.$B$10])/[.$B$8]" office:value-type="float" office:value="10.1570266987837" calcext:value-type="float">
            <text:p>10.1570266987837</text:p>
          </table:table-cell>
          <table:table-cell table:formula="of:=([.A53]+[.$B$10]+[.$B$11])/[.$B$8]" office:value-type="float" office:value="11.6580651271754" calcext:value-type="float">
            <text:p>11.6580651271754</text:p>
          </table:table-cell>
          <table:table-cell table:formula="of:=([.C53]+[.B53]-[.E53]-[.D53])/2" office:value-type="float" office:value="33.2826168256769" calcext:value-type="float">
            <text:p>33.2826168256769</text:p>
          </table:table-cell>
          <table:table-cell table:formula="of:=([.C53]+[.B53])/2" office:value-type="float" office:value="44.1901627386565" calcext:value-type="float">
            <text:p>44.1901627386565</text:p>
          </table:table-cell>
          <table:table-cell table:formula="of:=([.D53]+[.E53])/2" office:value-type="float" office:value="10.9075459129796" calcext:value-type="float">
            <text:p>10.9075459129796</text:p>
          </table:table-cell>
          <table:table-cell table:style-name="ce8" table:formula="of:=[.G53]-[.H53]" office:value-type="float" office:value="33.2826168256769" calcext:value-type="float">
            <text:p>33.2826168257</text:p>
          </table:table-cell>
          <table:table-cell table:formula="of:=MOD([.I53];40)" office:value-type="float" office:value="33.2826168256769" calcext:value-type="float">
            <text:p>33.2826168256769</text:p>
          </table:table-cell>
          <table:table-cell table:formula="of:=40-[.J53]" office:value-type="float" office:value="6.7173831743231" calcext:value-type="float">
            <text:p>6.717383174323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[.A54]+[.$B$10])/[.$D$34]" office:value-type="float" office:value="42.5009363342736" calcext:value-type="float">
            <text:p>42.50</text:p>
          </table:table-cell>
          <table:table-cell table:formula="of:=([.A54]+[.$B$10]+[.$B$11])/[.$D$34]" office:value-type="float" office:value="48.582151390052" calcext:value-type="float">
            <text:p>48.582151390052</text:p>
          </table:table-cell>
          <table:table-cell table:formula="of:=([.A54]+[.$B$10])/[.$B$8]" office:value-type="float" office:value="10.4905907939819" calcext:value-type="float">
            <text:p>10.4905907939819</text:p>
          </table:table-cell>
          <table:table-cell table:formula="of:=([.A54]+[.$B$10]+[.$B$11])/[.$B$8]" office:value-type="float" office:value="11.9916292223736" calcext:value-type="float">
            <text:p>11.9916292223736</text:p>
          </table:table-cell>
          <table:table-cell table:formula="of:=([.C54]+[.B54]-[.E54]-[.D54])/2" office:value-type="float" office:value="34.3004338539851" calcext:value-type="float">
            <text:p>34.3004338539851</text:p>
          </table:table-cell>
          <table:table-cell table:formula="of:=([.C54]+[.B54])/2" office:value-type="float" office:value="45.5415438621628" calcext:value-type="float">
            <text:p>45.5415438621628</text:p>
          </table:table-cell>
          <table:table-cell table:formula="of:=([.D54]+[.E54])/2" office:value-type="float" office:value="11.2411100081777" calcext:value-type="float">
            <text:p>11.2411100081777</text:p>
          </table:table-cell>
          <table:table-cell table:style-name="ce8" table:formula="of:=[.G54]-[.H54]" office:value-type="float" office:value="34.3004338539851" calcext:value-type="float">
            <text:p>34.3004338540</text:p>
          </table:table-cell>
          <table:table-cell table:formula="of:=MOD([.I54];40)" office:value-type="float" office:value="34.3004338539851" calcext:value-type="float">
            <text:p>34.3004338539851</text:p>
          </table:table-cell>
          <table:table-cell table:formula="of:=40-[.J54]" office:value-type="float" office:value="5.6995661460149" calcext:value-type="float">
            <text:p>5.69956614601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[.A55]+[.$B$10])/[.$D$34]" office:value-type="float" office:value="43.8523174577799" calcext:value-type="float">
            <text:p>43.85</text:p>
          </table:table-cell>
          <table:table-cell table:formula="of:=([.A55]+[.$B$10]+[.$B$11])/[.$D$34]" office:value-type="float" office:value="49.9335325135583" calcext:value-type="float">
            <text:p>49.9335325135583</text:p>
          </table:table-cell>
          <table:table-cell table:formula="of:=([.A55]+[.$B$10])/[.$B$8]" office:value-type="float" office:value="10.82415488918" calcext:value-type="float">
            <text:p>10.82415488918</text:p>
          </table:table-cell>
          <table:table-cell table:formula="of:=([.A55]+[.$B$10]+[.$B$11])/[.$B$8]" office:value-type="float" office:value="12.3251933175717" calcext:value-type="float">
            <text:p>12.3251933175717</text:p>
          </table:table-cell>
          <table:table-cell table:formula="of:=([.C55]+[.B55]-[.E55]-[.D55])/2" office:value-type="float" office:value="35.3182508822932" calcext:value-type="float">
            <text:p>35.3182508822932</text:p>
          </table:table-cell>
          <table:table-cell table:formula="of:=([.C55]+[.B55])/2" office:value-type="float" office:value="46.8929249856691" calcext:value-type="float">
            <text:p>46.8929249856691</text:p>
          </table:table-cell>
          <table:table-cell table:formula="of:=([.D55]+[.E55])/2" office:value-type="float" office:value="11.5746741033759" calcext:value-type="float">
            <text:p>11.5746741033759</text:p>
          </table:table-cell>
          <table:table-cell table:style-name="ce8" table:formula="of:=[.G55]-[.H55]" office:value-type="float" office:value="35.3182508822932" calcext:value-type="float">
            <text:p>35.3182508823</text:p>
          </table:table-cell>
          <table:table-cell table:formula="of:=MOD([.I55];40)" office:value-type="float" office:value="35.3182508822932" calcext:value-type="float">
            <text:p>35.3182508822932</text:p>
          </table:table-cell>
          <table:table-cell table:formula="of:=40-[.J55]" office:value-type="float" office:value="4.6817491177068" calcext:value-type="float">
            <text:p>4.681749117706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[.A56]+[.$B$10])/[.$D$34]" office:value-type="float" office:value="45.2036985812862" calcext:value-type="float">
            <text:p>45.20</text:p>
          </table:table-cell>
          <table:table-cell table:formula="of:=([.A56]+[.$B$10]+[.$B$11])/[.$D$34]" office:value-type="float" office:value="51.2849136370647" calcext:value-type="float">
            <text:p>51.2849136370647</text:p>
          </table:table-cell>
          <table:table-cell table:formula="of:=([.A56]+[.$B$10])/[.$B$8]" office:value-type="float" office:value="11.1577189843782" calcext:value-type="float">
            <text:p>11.1577189843782</text:p>
          </table:table-cell>
          <table:table-cell table:formula="of:=([.A56]+[.$B$10]+[.$B$11])/[.$B$8]" office:value-type="float" office:value="12.6587574127699" calcext:value-type="float">
            <text:p>12.6587574127699</text:p>
          </table:table-cell>
          <table:table-cell table:formula="of:=([.C56]+[.B56]-[.E56]-[.D56])/2" office:value-type="float" office:value="36.3360679106014" calcext:value-type="float">
            <text:p>36.3360679106014</text:p>
          </table:table-cell>
          <table:table-cell table:formula="of:=([.C56]+[.B56])/2" office:value-type="float" office:value="48.2443061091754" calcext:value-type="float">
            <text:p>48.2443061091754</text:p>
          </table:table-cell>
          <table:table-cell table:formula="of:=([.D56]+[.E56])/2" office:value-type="float" office:value="11.908238198574" calcext:value-type="float">
            <text:p>11.908238198574</text:p>
          </table:table-cell>
          <table:table-cell table:style-name="ce8" table:formula="of:=[.G56]-[.H56]" office:value-type="float" office:value="36.3360679106014" calcext:value-type="float">
            <text:p>36.3360679106</text:p>
          </table:table-cell>
          <table:table-cell table:formula="of:=MOD([.I56];40)" office:value-type="float" office:value="36.3360679106014" calcext:value-type="float">
            <text:p>36.3360679106014</text:p>
          </table:table-cell>
          <table:table-cell table:formula="of:=40-[.J56]" office:value-type="float" office:value="3.6639320893986" calcext:value-type="float">
            <text:p>3.663932089398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[.A57]+[.$B$10])/[.$D$34]" office:value-type="float" office:value="46.5550797047925" calcext:value-type="float">
            <text:p>46.56</text:p>
          </table:table-cell>
          <table:table-cell table:formula="of:=([.A57]+[.$B$10]+[.$B$11])/[.$D$34]" office:value-type="float" office:value="52.636294760571" calcext:value-type="float">
            <text:p>52.636294760571</text:p>
          </table:table-cell>
          <table:table-cell table:formula="of:=([.A57]+[.$B$10])/[.$B$8]" office:value-type="float" office:value="11.4912830795763" calcext:value-type="float">
            <text:p>11.4912830795763</text:p>
          </table:table-cell>
          <table:table-cell table:formula="of:=([.A57]+[.$B$10]+[.$B$11])/[.$B$8]" office:value-type="float" office:value="12.992321507968" calcext:value-type="float">
            <text:p>12.992321507968</text:p>
          </table:table-cell>
          <table:table-cell table:formula="of:=([.C57]+[.B57]-[.E57]-[.D57])/2" office:value-type="float" office:value="37.3538849389096" calcext:value-type="float">
            <text:p>37.3538849389096</text:p>
          </table:table-cell>
          <table:table-cell table:formula="of:=([.C57]+[.B57])/2" office:value-type="float" office:value="49.5956872326817" calcext:value-type="float">
            <text:p>49.5956872326817</text:p>
          </table:table-cell>
          <table:table-cell table:formula="of:=([.D57]+[.E57])/2" office:value-type="float" office:value="12.2418022937722" calcext:value-type="float">
            <text:p>12.2418022937722</text:p>
          </table:table-cell>
          <table:table-cell table:style-name="ce8" table:formula="of:=[.G57]-[.H57]" office:value-type="float" office:value="37.3538849389095" calcext:value-type="float">
            <text:p>37.3538849389</text:p>
          </table:table-cell>
          <table:table-cell table:formula="of:=MOD([.I57];40)" office:value-type="float" office:value="37.3538849389095" calcext:value-type="float">
            <text:p>37.3538849389095</text:p>
          </table:table-cell>
          <table:table-cell table:formula="of:=40-[.J57]" office:value-type="float" office:value="2.6461150610905" calcext:value-type="float">
            <text:p>2.64611506109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[.A58]+[.$B$10])/[.$D$34]" office:value-type="float" office:value="47.9064608282988" calcext:value-type="float">
            <text:p>47.91</text:p>
          </table:table-cell>
          <table:table-cell table:formula="of:=([.A58]+[.$B$10]+[.$B$11])/[.$D$34]" office:value-type="float" office:value="53.9876758840773" calcext:value-type="float">
            <text:p>53.9876758840773</text:p>
          </table:table-cell>
          <table:table-cell table:formula="of:=([.A58]+[.$B$10])/[.$B$8]" office:value-type="float" office:value="11.8248471747745" calcext:value-type="float">
            <text:p>11.8248471747745</text:p>
          </table:table-cell>
          <table:table-cell table:formula="of:=([.A58]+[.$B$10]+[.$B$11])/[.$B$8]" office:value-type="float" office:value="13.3258856031662" calcext:value-type="float">
            <text:p>13.3258856031662</text:p>
          </table:table-cell>
          <table:table-cell table:formula="of:=([.C58]+[.B58]-[.E58]-[.D58])/2" office:value-type="float" office:value="38.3717019672177" calcext:value-type="float">
            <text:p>38.3717019672177</text:p>
          </table:table-cell>
          <table:table-cell table:formula="of:=([.C58]+[.B58])/2" office:value-type="float" office:value="50.947068356188" calcext:value-type="float">
            <text:p>50.947068356188</text:p>
          </table:table-cell>
          <table:table-cell table:formula="of:=([.D58]+[.E58])/2" office:value-type="float" office:value="12.5753663889703" calcext:value-type="float">
            <text:p>12.5753663889703</text:p>
          </table:table-cell>
          <table:table-cell table:style-name="ce8" table:formula="of:=[.G58]-[.H58]" office:value-type="float" office:value="38.3717019672177" calcext:value-type="float">
            <text:p>38.3717019672</text:p>
          </table:table-cell>
          <table:table-cell table:formula="of:=MOD([.I58];40)" office:value-type="float" office:value="38.3717019672177" calcext:value-type="float">
            <text:p>38.3717019672177</text:p>
          </table:table-cell>
          <table:table-cell table:formula="of:=40-[.J58]" office:value-type="float" office:value="1.6282980327823" calcext:value-type="float">
            <text:p>1.62829803278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[.A59]+[.$B$10])/[.$D$34]" office:value-type="float" office:value="49.2578419518052" calcext:value-type="float">
            <text:p>49.26</text:p>
          </table:table-cell>
          <table:table-cell table:formula="of:=([.A59]+[.$B$10]+[.$B$11])/[.$D$34]" office:value-type="float" office:value="55.3390570075836" calcext:value-type="float">
            <text:p>55.3390570075836</text:p>
          </table:table-cell>
          <table:table-cell table:formula="of:=([.A59]+[.$B$10])/[.$B$8]" office:value-type="float" office:value="12.1584112699726" calcext:value-type="float">
            <text:p>12.1584112699726</text:p>
          </table:table-cell>
          <table:table-cell table:formula="of:=([.A59]+[.$B$10]+[.$B$11])/[.$B$8]" office:value-type="float" office:value="13.6594496983643" calcext:value-type="float">
            <text:p>13.6594496983643</text:p>
          </table:table-cell>
          <table:table-cell table:formula="of:=([.C59]+[.B59]-[.E59]-[.D59])/2" office:value-type="float" office:value="39.3895189955259" calcext:value-type="float">
            <text:p>39.3895189955259</text:p>
          </table:table-cell>
          <table:table-cell table:formula="of:=([.C59]+[.B59])/2" office:value-type="float" office:value="52.2984494796944" calcext:value-type="float">
            <text:p>52.2984494796944</text:p>
          </table:table-cell>
          <table:table-cell table:formula="of:=([.D59]+[.E59])/2" office:value-type="float" office:value="12.9089304841685" calcext:value-type="float">
            <text:p>12.9089304841685</text:p>
          </table:table-cell>
          <table:table-cell table:style-name="ce8" table:formula="of:=[.G59]-[.H59]" office:value-type="float" office:value="39.3895189955259" calcext:value-type="float">
            <text:p>39.3895189955</text:p>
          </table:table-cell>
          <table:table-cell table:formula="of:=MOD([.I59];40)" office:value-type="float" office:value="39.3895189955259" calcext:value-type="float">
            <text:p>39.3895189955259</text:p>
          </table:table-cell>
          <table:table-cell table:formula="of:=40-[.J59]" office:value-type="float" office:value="0.610481004474103" calcext:value-type="float">
            <text:p>0.61048100447410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[.A60]+[.$B$10])/[.$D$34]" office:value-type="float" office:value="50.6092230753115" calcext:value-type="float">
            <text:p>50.61</text:p>
          </table:table-cell>
          <table:table-cell table:formula="of:=([.A60]+[.$B$10]+[.$B$11])/[.$D$34]" office:value-type="float" office:value="56.6904381310899" calcext:value-type="float">
            <text:p>56.6904381310899</text:p>
          </table:table-cell>
          <table:table-cell table:formula="of:=([.A60]+[.$B$10])/[.$B$8]" office:value-type="float" office:value="12.4919753651708" calcext:value-type="float">
            <text:p>12.4919753651708</text:p>
          </table:table-cell>
          <table:table-cell table:formula="of:=([.A60]+[.$B$10]+[.$B$11])/[.$B$8]" office:value-type="float" office:value="13.9930137935625" calcext:value-type="float">
            <text:p>13.9930137935625</text:p>
          </table:table-cell>
          <table:table-cell table:formula="of:=([.C60]+[.B60]-[.E60]-[.D60])/2" office:value-type="float" office:value="40.4073360238341" calcext:value-type="float">
            <text:p>40.4073360238341</text:p>
          </table:table-cell>
          <table:table-cell table:formula="of:=([.C60]+[.B60])/2" office:value-type="float" office:value="53.6498306032007" calcext:value-type="float">
            <text:p>53.6498306032007</text:p>
          </table:table-cell>
          <table:table-cell table:formula="of:=([.D60]+[.E60])/2" office:value-type="float" office:value="13.2424945793666" calcext:value-type="float">
            <text:p>13.2424945793666</text:p>
          </table:table-cell>
          <table:table-cell table:style-name="ce8" table:formula="of:=[.G60]-[.H60]" office:value-type="float" office:value="40.407336023834" calcext:value-type="float">
            <text:p>40.4073360238</text:p>
          </table:table-cell>
          <table:table-cell table:formula="of:=MOD([.I60];40)" office:value-type="float" office:value="0.407336023833999" calcext:value-type="float">
            <text:p>0.407336023833999</text:p>
          </table:table-cell>
          <table:table-cell table:formula="of:=40-[.J60]" office:value-type="float" office:value="39.592663976166" calcext:value-type="float">
            <text:p>39.59266397616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[.A61]+[.$B$10])/[.$D$34]" office:value-type="float" office:value="51.9606041988178" calcext:value-type="float">
            <text:p>51.96</text:p>
          </table:table-cell>
          <table:table-cell table:formula="of:=([.A61]+[.$B$10]+[.$B$11])/[.$D$34]" office:value-type="float" office:value="58.0418192545962" calcext:value-type="float">
            <text:p>58.0418192545962</text:p>
          </table:table-cell>
          <table:table-cell table:formula="of:=([.A61]+[.$B$10])/[.$B$8]" office:value-type="float" office:value="12.8255394603689" calcext:value-type="float">
            <text:p>12.8255394603689</text:p>
          </table:table-cell>
          <table:table-cell table:formula="of:=([.A61]+[.$B$10]+[.$B$11])/[.$B$8]" office:value-type="float" office:value="14.3265778887606" calcext:value-type="float">
            <text:p>14.3265778887606</text:p>
          </table:table-cell>
          <table:table-cell table:formula="of:=([.C61]+[.B61]-[.E61]-[.D61])/2" office:value-type="float" office:value="41.4251530521422" calcext:value-type="float">
            <text:p>41.4251530521422</text:p>
          </table:table-cell>
          <table:table-cell table:formula="of:=([.C61]+[.B61])/2" office:value-type="float" office:value="55.001211726707" calcext:value-type="float">
            <text:p>55.001211726707</text:p>
          </table:table-cell>
          <table:table-cell table:formula="of:=([.D61]+[.E61])/2" office:value-type="float" office:value="13.5760586745648" calcext:value-type="float">
            <text:p>13.5760586745648</text:p>
          </table:table-cell>
          <table:table-cell table:style-name="ce8" table:formula="of:=[.G61]-[.H61]" office:value-type="float" office:value="41.4251530521422" calcext:value-type="float">
            <text:p>41.4251530521</text:p>
          </table:table-cell>
          <table:table-cell table:formula="of:=MOD([.I61];40)" office:value-type="float" office:value="1.4251530521422" calcext:value-type="float">
            <text:p>1.4251530521422</text:p>
          </table:table-cell>
          <table:table-cell table:formula="of:=40-[.J61]" office:value-type="float" office:value="38.5748469478578" calcext:value-type="float">
            <text:p>38.574846947857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[.A62]+[.$B$10])/[.$D$34]" office:value-type="float" office:value="53.3119853223241" calcext:value-type="float">
            <text:p>53.31</text:p>
          </table:table-cell>
          <table:table-cell table:formula="of:=([.A62]+[.$B$10]+[.$B$11])/[.$D$34]" office:value-type="float" office:value="59.3932003781025" calcext:value-type="float">
            <text:p>59.3932003781025</text:p>
          </table:table-cell>
          <table:table-cell table:formula="of:=([.A62]+[.$B$10])/[.$B$8]" office:value-type="float" office:value="13.1591035555671" calcext:value-type="float">
            <text:p>13.1591035555671</text:p>
          </table:table-cell>
          <table:table-cell table:formula="of:=([.A62]+[.$B$10]+[.$B$11])/[.$B$8]" office:value-type="float" office:value="14.6601419839588" calcext:value-type="float">
            <text:p>14.6601419839588</text:p>
          </table:table-cell>
          <table:table-cell table:formula="of:=([.C62]+[.B62]-[.E62]-[.D62])/2" office:value-type="float" office:value="42.4429700804504" calcext:value-type="float">
            <text:p>42.4429700804504</text:p>
          </table:table-cell>
          <table:table-cell table:formula="of:=([.C62]+[.B62])/2" office:value-type="float" office:value="56.3525928502133" calcext:value-type="float">
            <text:p>56.3525928502133</text:p>
          </table:table-cell>
          <table:table-cell table:formula="of:=([.D62]+[.E62])/2" office:value-type="float" office:value="13.9096227697629" calcext:value-type="float">
            <text:p>13.9096227697629</text:p>
          </table:table-cell>
          <table:table-cell table:style-name="ce8" table:formula="of:=[.G62]-[.H62]" office:value-type="float" office:value="42.4429700804504" calcext:value-type="float">
            <text:p>42.4429700805</text:p>
          </table:table-cell>
          <table:table-cell table:formula="of:=MOD([.I62];40)" office:value-type="float" office:value="2.4429700804504" calcext:value-type="float">
            <text:p>2.4429700804504</text:p>
          </table:table-cell>
          <table:table-cell table:formula="of:=40-[.J62]" office:value-type="float" office:value="37.5570299195496" calcext:value-type="float">
            <text:p>37.55702991954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A63]+[.$B$10])/[.$D$34]" office:value-type="float" office:value="54.6633664458304" calcext:value-type="float">
            <text:p>54.66</text:p>
          </table:table-cell>
          <table:table-cell table:formula="of:=([.A63]+[.$B$10]+[.$B$11])/[.$D$34]" office:value-type="float" office:value="60.7445815016089" calcext:value-type="float">
            <text:p>60.7445815016089</text:p>
          </table:table-cell>
          <table:table-cell table:formula="of:=([.A63]+[.$B$10])/[.$B$8]" office:value-type="float" office:value="13.4926676507653" calcext:value-type="float">
            <text:p>13.4926676507653</text:p>
          </table:table-cell>
          <table:table-cell table:formula="of:=([.A63]+[.$B$10]+[.$B$11])/[.$B$8]" office:value-type="float" office:value="14.9937060791569" calcext:value-type="float">
            <text:p>14.9937060791569</text:p>
          </table:table-cell>
          <table:table-cell table:formula="of:=([.C63]+[.B63]-[.E63]-[.D63])/2" office:value-type="float" office:value="43.4607871087585" calcext:value-type="float">
            <text:p>43.4607871087585</text:p>
          </table:table-cell>
          <table:table-cell table:formula="of:=([.C63]+[.B63])/2" office:value-type="float" office:value="57.7039739737196" calcext:value-type="float">
            <text:p>57.7039739737196</text:p>
          </table:table-cell>
          <table:table-cell table:formula="of:=([.D63]+[.E63])/2" office:value-type="float" office:value="14.2431868649611" calcext:value-type="float">
            <text:p>14.2431868649611</text:p>
          </table:table-cell>
          <table:table-cell table:style-name="ce8" table:formula="of:=[.G63]-[.H63]" office:value-type="float" office:value="43.4607871087585" calcext:value-type="float">
            <text:p>43.4607871088</text:p>
          </table:table-cell>
          <table:table-cell table:formula="of:=MOD([.I63];40)" office:value-type="float" office:value="3.4607871087585" calcext:value-type="float">
            <text:p>3.4607871087585</text:p>
          </table:table-cell>
          <table:table-cell table:formula="of:=40-[.J63]" office:value-type="float" office:value="36.5392128912415" calcext:value-type="float">
            <text:p>36.539212891241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[.A64]+[.$B$10])/[.$D$34]" office:value-type="float" office:value="56.0147475693367" calcext:value-type="float">
            <text:p>56.01</text:p>
          </table:table-cell>
          <table:table-cell table:formula="of:=([.A64]+[.$B$10]+[.$B$11])/[.$D$34]" office:value-type="float" office:value="62.0959626251152" calcext:value-type="float">
            <text:p>62.0959626251152</text:p>
          </table:table-cell>
          <table:table-cell table:formula="of:=([.A64]+[.$B$10])/[.$B$8]" office:value-type="float" office:value="13.8262317459634" calcext:value-type="float">
            <text:p>13.8262317459634</text:p>
          </table:table-cell>
          <table:table-cell table:formula="of:=([.A64]+[.$B$10]+[.$B$11])/[.$B$8]" office:value-type="float" office:value="15.3272701743551" calcext:value-type="float">
            <text:p>15.3272701743551</text:p>
          </table:table-cell>
          <table:table-cell table:formula="of:=([.C64]+[.B64]-[.E64]-[.D64])/2" office:value-type="float" office:value="44.4786041370667" calcext:value-type="float">
            <text:p>44.4786041370667</text:p>
          </table:table-cell>
          <table:table-cell table:formula="of:=([.C64]+[.B64])/2" office:value-type="float" office:value="59.0553550972259" calcext:value-type="float">
            <text:p>59.0553550972259</text:p>
          </table:table-cell>
          <table:table-cell table:formula="of:=([.D64]+[.E64])/2" office:value-type="float" office:value="14.5767509601592" calcext:value-type="float">
            <text:p>14.5767509601592</text:p>
          </table:table-cell>
          <table:table-cell table:style-name="ce8" table:formula="of:=[.G64]-[.H64]" office:value-type="float" office:value="44.4786041370667" calcext:value-type="float">
            <text:p>44.4786041371</text:p>
          </table:table-cell>
          <table:table-cell table:formula="of:=MOD([.I64];40)" office:value-type="float" office:value="4.4786041370667" calcext:value-type="float">
            <text:p>4.4786041370667</text:p>
          </table:table-cell>
          <table:table-cell table:formula="of:=40-[.J64]" office:value-type="float" office:value="35.5213958629333" calcext:value-type="float">
            <text:p>35.521395862933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[.A65]+[.$B$10])/[.$D$34]" office:value-type="float" office:value="57.366128692843" calcext:value-type="float">
            <text:p>57.37</text:p>
          </table:table-cell>
          <table:table-cell table:formula="of:=([.A65]+[.$B$10]+[.$B$11])/[.$D$34]" office:value-type="float" office:value="63.4473437486215" calcext:value-type="float">
            <text:p>63.4473437486215</text:p>
          </table:table-cell>
          <table:table-cell table:formula="of:=([.A65]+[.$B$10])/[.$B$8]" office:value-type="float" office:value="14.1597958411616" calcext:value-type="float">
            <text:p>14.1597958411616</text:p>
          </table:table-cell>
          <table:table-cell table:formula="of:=([.A65]+[.$B$10]+[.$B$11])/[.$B$8]" office:value-type="float" office:value="15.6608342695532" calcext:value-type="float">
            <text:p>15.6608342695532</text:p>
          </table:table-cell>
          <table:table-cell table:formula="of:=([.C65]+[.B65]-[.E65]-[.D65])/2" office:value-type="float" office:value="45.4964211653749" calcext:value-type="float">
            <text:p>45.4964211653749</text:p>
          </table:table-cell>
          <table:table-cell table:formula="of:=([.C65]+[.B65])/2" office:value-type="float" office:value="60.4067362207322" calcext:value-type="float">
            <text:p>60.4067362207322</text:p>
          </table:table-cell>
          <table:table-cell table:formula="of:=([.D65]+[.E65])/2" office:value-type="float" office:value="14.9103150553574" calcext:value-type="float">
            <text:p>14.9103150553574</text:p>
          </table:table-cell>
          <table:table-cell table:style-name="ce8" table:formula="of:=[.G65]-[.H65]" office:value-type="float" office:value="45.4964211653749" calcext:value-type="float">
            <text:p>45.4964211654</text:p>
          </table:table-cell>
          <table:table-cell table:formula="of:=MOD([.I65];40)" office:value-type="float" office:value="5.4964211653749" calcext:value-type="float">
            <text:p>5.4964211653749</text:p>
          </table:table-cell>
          <table:table-cell table:formula="of:=40-[.J65]" office:value-type="float" office:value="34.5035788346251" calcext:value-type="float">
            <text:p>34.503578834625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[.A66]+[.$B$10])/[.$D$34]" office:value-type="float" office:value="58.7175098163494" calcext:value-type="float">
            <text:p>58.72</text:p>
          </table:table-cell>
          <table:table-cell table:formula="of:=([.A66]+[.$B$10]+[.$B$11])/[.$D$34]" office:value-type="float" office:value="64.7987248721278" calcext:value-type="float">
            <text:p>64.7987248721278</text:p>
          </table:table-cell>
          <table:table-cell table:formula="of:=([.A66]+[.$B$10])/[.$B$8]" office:value-type="float" office:value="14.4933599363597" calcext:value-type="float">
            <text:p>14.4933599363597</text:p>
          </table:table-cell>
          <table:table-cell table:formula="of:=([.A66]+[.$B$10]+[.$B$11])/[.$B$8]" office:value-type="float" office:value="15.9943983647514" calcext:value-type="float">
            <text:p>15.9943983647514</text:p>
          </table:table-cell>
          <table:table-cell table:formula="of:=([.C66]+[.B66]-[.E66]-[.D66])/2" office:value-type="float" office:value="46.5142381936831" calcext:value-type="float">
            <text:p>46.5142381936831</text:p>
          </table:table-cell>
          <table:table-cell table:formula="of:=([.C66]+[.B66])/2" office:value-type="float" office:value="61.7581173442386" calcext:value-type="float">
            <text:p>61.7581173442386</text:p>
          </table:table-cell>
          <table:table-cell table:formula="of:=([.D66]+[.E66])/2" office:value-type="float" office:value="15.2438791505555" calcext:value-type="float">
            <text:p>15.2438791505555</text:p>
          </table:table-cell>
          <table:table-cell table:style-name="ce8" table:formula="of:=[.G66]-[.H66]" office:value-type="float" office:value="46.514238193683" calcext:value-type="float">
            <text:p>46.5142381937</text:p>
          </table:table-cell>
          <table:table-cell table:formula="of:=MOD([.I66];40)" office:value-type="float" office:value="6.514238193683" calcext:value-type="float">
            <text:p>6.514238193683</text:p>
          </table:table-cell>
          <table:table-cell table:formula="of:=40-[.J66]" office:value-type="float" office:value="33.485761806317" calcext:value-type="float">
            <text:p>33.48576180631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[.A67]+[.$B$10])/[.$D$34]" office:value-type="float" office:value="60.0688909398557" calcext:value-type="float">
            <text:p>60.07</text:p>
          </table:table-cell>
          <table:table-cell table:formula="of:=([.A67]+[.$B$10]+[.$B$11])/[.$D$34]" office:value-type="float" office:value="66.1501059956341" calcext:value-type="float">
            <text:p>66.1501059956341</text:p>
          </table:table-cell>
          <table:table-cell table:formula="of:=([.A67]+[.$B$10])/[.$B$8]" office:value-type="float" office:value="14.8269240315579" calcext:value-type="float">
            <text:p>14.8269240315579</text:p>
          </table:table-cell>
          <table:table-cell table:formula="of:=([.A67]+[.$B$10]+[.$B$11])/[.$B$8]" office:value-type="float" office:value="16.3279624599495" calcext:value-type="float">
            <text:p>16.3279624599495</text:p>
          </table:table-cell>
          <table:table-cell table:formula="of:=([.C67]+[.B67]-[.E67]-[.D67])/2" office:value-type="float" office:value="47.5320552219912" calcext:value-type="float">
            <text:p>47.5320552219912</text:p>
          </table:table-cell>
          <table:table-cell table:formula="of:=([.C67]+[.B67])/2" office:value-type="float" office:value="63.1094984677449" calcext:value-type="float">
            <text:p>63.1094984677449</text:p>
          </table:table-cell>
          <table:table-cell table:formula="of:=([.D67]+[.E67])/2" office:value-type="float" office:value="15.5774432457537" calcext:value-type="float">
            <text:p>15.5774432457537</text:p>
          </table:table-cell>
          <table:table-cell table:style-name="ce8" table:formula="of:=[.G67]-[.H67]" office:value-type="float" office:value="47.5320552219912" calcext:value-type="float">
            <text:p>47.5320552220</text:p>
          </table:table-cell>
          <table:table-cell table:formula="of:=MOD([.I67];40)" office:value-type="float" office:value="7.5320552219912" calcext:value-type="float">
            <text:p>7.5320552219912</text:p>
          </table:table-cell>
          <table:table-cell table:formula="of:=40-[.J67]" office:value-type="float" office:value="32.4679447780088" calcext:value-type="float">
            <text:p>32.467944778008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[.A68]+[.$B$10])/[.$D$34]" office:value-type="float" office:value="61.420272063362" calcext:value-type="float">
            <text:p>61.42</text:p>
          </table:table-cell>
          <table:table-cell table:formula="of:=([.A68]+[.$B$10]+[.$B$11])/[.$D$34]" office:value-type="float" office:value="67.5014871191404" calcext:value-type="float">
            <text:p>67.5014871191404</text:p>
          </table:table-cell>
          <table:table-cell table:formula="of:=([.A68]+[.$B$10])/[.$B$8]" office:value-type="float" office:value="15.160488126756" calcext:value-type="float">
            <text:p>15.160488126756</text:p>
          </table:table-cell>
          <table:table-cell table:formula="of:=([.A68]+[.$B$10]+[.$B$11])/[.$B$8]" office:value-type="float" office:value="16.6615265551477" calcext:value-type="float">
            <text:p>16.6615265551477</text:p>
          </table:table-cell>
          <table:table-cell table:formula="of:=([.C68]+[.B68]-[.E68]-[.D68])/2" office:value-type="float" office:value="48.5498722502994" calcext:value-type="float">
            <text:p>48.5498722502994</text:p>
          </table:table-cell>
          <table:table-cell table:formula="of:=([.C68]+[.B68])/2" office:value-type="float" office:value="64.4608795912512" calcext:value-type="float">
            <text:p>64.4608795912512</text:p>
          </table:table-cell>
          <table:table-cell table:formula="of:=([.D68]+[.E68])/2" office:value-type="float" office:value="15.9110073409519" calcext:value-type="float">
            <text:p>15.9110073409519</text:p>
          </table:table-cell>
          <table:table-cell table:style-name="ce8" table:formula="of:=[.G68]-[.H68]" office:value-type="float" office:value="48.5498722502993" calcext:value-type="float">
            <text:p>48.5498722503</text:p>
          </table:table-cell>
          <table:table-cell table:formula="of:=MOD([.I68];40)" office:value-type="float" office:value="8.5498722502993" calcext:value-type="float">
            <text:p>8.5498722502993</text:p>
          </table:table-cell>
          <table:table-cell table:formula="of:=40-[.J68]" office:value-type="float" office:value="31.4501277497007" calcext:value-type="float">
            <text:p>31.450127749700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[.A69]+[.$B$10])/[.$D$34]" office:value-type="float" office:value="62.7716531868683" calcext:value-type="float">
            <text:p>62.77</text:p>
          </table:table-cell>
          <table:table-cell table:formula="of:=([.A69]+[.$B$10]+[.$B$11])/[.$D$34]" office:value-type="float" office:value="68.8528682426468" calcext:value-type="float">
            <text:p>68.8528682426468</text:p>
          </table:table-cell>
          <table:table-cell table:formula="of:=([.A69]+[.$B$10])/[.$B$8]" office:value-type="float" office:value="15.4940522219542" calcext:value-type="float">
            <text:p>15.4940522219542</text:p>
          </table:table-cell>
          <table:table-cell table:formula="of:=([.A69]+[.$B$10]+[.$B$11])/[.$B$8]" office:value-type="float" office:value="16.9950906503458" calcext:value-type="float">
            <text:p>16.9950906503458</text:p>
          </table:table-cell>
          <table:table-cell table:formula="of:=([.C69]+[.B69]-[.E69]-[.D69])/2" office:value-type="float" office:value="49.5676892786075" calcext:value-type="float">
            <text:p>49.5676892786075</text:p>
          </table:table-cell>
          <table:table-cell table:formula="of:=([.C69]+[.B69])/2" office:value-type="float" office:value="65.8122607147575" calcext:value-type="float">
            <text:p>65.8122607147575</text:p>
          </table:table-cell>
          <table:table-cell table:formula="of:=([.D69]+[.E69])/2" office:value-type="float" office:value="16.24457143615" calcext:value-type="float">
            <text:p>16.24457143615</text:p>
          </table:table-cell>
          <table:table-cell table:style-name="ce8" table:formula="of:=[.G69]-[.H69]" office:value-type="float" office:value="49.5676892786075" calcext:value-type="float">
            <text:p>49.5676892786</text:p>
          </table:table-cell>
          <table:table-cell table:formula="of:=MOD([.I69];40)" office:value-type="float" office:value="9.5676892786075" calcext:value-type="float">
            <text:p>9.5676892786075</text:p>
          </table:table-cell>
          <table:table-cell table:formula="of:=40-[.J69]" office:value-type="float" office:value="30.4323107213925" calcext:value-type="float">
            <text:p>30.432310721392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[.A70]+[.$B$10])/[.$D$34]" office:value-type="float" office:value="64.1230343103746" calcext:value-type="float">
            <text:p>64.12</text:p>
          </table:table-cell>
          <table:table-cell table:formula="of:=([.A70]+[.$B$10]+[.$B$11])/[.$D$34]" office:value-type="float" office:value="70.2042493661531" calcext:value-type="float">
            <text:p>70.2042493661531</text:p>
          </table:table-cell>
          <table:table-cell table:formula="of:=([.A70]+[.$B$10])/[.$B$8]" office:value-type="float" office:value="15.8276163171523" calcext:value-type="float">
            <text:p>15.8276163171523</text:p>
          </table:table-cell>
          <table:table-cell table:formula="of:=([.A70]+[.$B$10]+[.$B$11])/[.$B$8]" office:value-type="float" office:value="17.328654745544" calcext:value-type="float">
            <text:p>17.328654745544</text:p>
          </table:table-cell>
          <table:table-cell table:formula="of:=([.C70]+[.B70]-[.E70]-[.D70])/2" office:value-type="float" office:value="50.5855063069157" calcext:value-type="float">
            <text:p>50.5855063069157</text:p>
          </table:table-cell>
          <table:table-cell table:formula="of:=([.C70]+[.B70])/2" office:value-type="float" office:value="67.1636418382638" calcext:value-type="float">
            <text:p>67.1636418382638</text:p>
          </table:table-cell>
          <table:table-cell table:formula="of:=([.D70]+[.E70])/2" office:value-type="float" office:value="16.5781355313482" calcext:value-type="float">
            <text:p>16.5781355313482</text:p>
          </table:table-cell>
          <table:table-cell table:style-name="ce8" table:formula="of:=[.G70]-[.H70]" office:value-type="float" office:value="50.5855063069157" calcext:value-type="float">
            <text:p>50.5855063069</text:p>
          </table:table-cell>
          <table:table-cell table:formula="of:=MOD([.I70];40)" office:value-type="float" office:value="10.5855063069157" calcext:value-type="float">
            <text:p>10.5855063069157</text:p>
          </table:table-cell>
          <table:table-cell table:formula="of:=40-[.J70]" office:value-type="float" office:value="29.4144936930843" calcext:value-type="float">
            <text:p>29.41449369308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A71]+[.$B$10])/[.$D$34]" office:value-type="float" office:value="65.4744154338809" calcext:value-type="float">
            <text:p>65.47</text:p>
          </table:table-cell>
          <table:table-cell table:formula="of:=([.A71]+[.$B$10]+[.$B$11])/[.$D$34]" office:value-type="float" office:value="71.5556304896594" calcext:value-type="float">
            <text:p>71.5556304896594</text:p>
          </table:table-cell>
          <table:table-cell table:formula="of:=([.A71]+[.$B$10])/[.$B$8]" office:value-type="float" office:value="16.1611804123505" calcext:value-type="float">
            <text:p>16.1611804123505</text:p>
          </table:table-cell>
          <table:table-cell table:formula="of:=([.A71]+[.$B$10]+[.$B$11])/[.$B$8]" office:value-type="float" office:value="17.6622188407422" calcext:value-type="float">
            <text:p>17.6622188407422</text:p>
          </table:table-cell>
          <table:table-cell table:formula="of:=([.C71]+[.B71]-[.E71]-[.D71])/2" office:value-type="float" office:value="51.6033233352238" calcext:value-type="float">
            <text:p>51.6033233352238</text:p>
          </table:table-cell>
          <table:table-cell table:formula="of:=([.C71]+[.B71])/2" office:value-type="float" office:value="68.5150229617701" calcext:value-type="float">
            <text:p>68.5150229617701</text:p>
          </table:table-cell>
          <table:table-cell table:formula="of:=([.D71]+[.E71])/2" office:value-type="float" office:value="16.9116996265463" calcext:value-type="float">
            <text:p>16.9116996265463</text:p>
          </table:table-cell>
          <table:table-cell table:style-name="ce8" table:formula="of:=[.G71]-[.H71]" office:value-type="float" office:value="51.6033233352238" calcext:value-type="float">
            <text:p>51.6033233352</text:p>
          </table:table-cell>
          <table:table-cell table:formula="of:=MOD([.I71];40)" office:value-type="float" office:value="11.6033233352238" calcext:value-type="float">
            <text:p>11.6033233352238</text:p>
          </table:table-cell>
          <table:table-cell table:formula="of:=40-[.J71]" office:value-type="float" office:value="28.3966766647762" calcext:value-type="float">
            <text:p>28.396676664776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[.A72]+[.$B$10])/[.$D$34]" office:value-type="float" office:value="66.8257965573872" calcext:value-type="float">
            <text:p>66.83</text:p>
          </table:table-cell>
          <table:table-cell table:formula="of:=([.A72]+[.$B$10]+[.$B$11])/[.$D$34]" office:value-type="float" office:value="72.9070116131657" calcext:value-type="float">
            <text:p>72.9070116131657</text:p>
          </table:table-cell>
          <table:table-cell table:formula="of:=([.A72]+[.$B$10])/[.$B$8]" office:value-type="float" office:value="16.4947445075486" calcext:value-type="float">
            <text:p>16.4947445075486</text:p>
          </table:table-cell>
          <table:table-cell table:formula="of:=([.A72]+[.$B$10]+[.$B$11])/[.$B$8]" office:value-type="float" office:value="17.9957829359403" calcext:value-type="float">
            <text:p>17.9957829359403</text:p>
          </table:table-cell>
          <table:table-cell table:formula="of:=([.C72]+[.B72]-[.E72]-[.D72])/2" office:value-type="float" office:value="52.621140363532" calcext:value-type="float">
            <text:p>52.621140363532</text:p>
          </table:table-cell>
          <table:table-cell table:formula="of:=([.C72]+[.B72])/2" office:value-type="float" office:value="69.8664040852765" calcext:value-type="float">
            <text:p>69.8664040852765</text:p>
          </table:table-cell>
          <table:table-cell table:formula="of:=([.D72]+[.E72])/2" office:value-type="float" office:value="17.2452637217445" calcext:value-type="float">
            <text:p>17.2452637217445</text:p>
          </table:table-cell>
          <table:table-cell table:style-name="ce8" table:formula="of:=[.G72]-[.H72]" office:value-type="float" office:value="52.621140363532" calcext:value-type="float">
            <text:p>52.6211403635</text:p>
          </table:table-cell>
          <table:table-cell table:formula="of:=MOD([.I72];40)" office:value-type="float" office:value="12.621140363532" calcext:value-type="float">
            <text:p>12.621140363532</text:p>
          </table:table-cell>
          <table:table-cell table:formula="of:=40-[.J72]" office:value-type="float" office:value="27.378859636468" calcext:value-type="float">
            <text:p>27.3788596364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A73]+[.$B$10])/[.$D$34]" office:value-type="float" office:value="68.1771776808936" calcext:value-type="float">
            <text:p>68.18</text:p>
          </table:table-cell>
          <table:table-cell table:formula="of:=([.A73]+[.$B$10]+[.$B$11])/[.$D$34]" office:value-type="float" office:value="74.258392736672" calcext:value-type="float">
            <text:p>74.258392736672</text:p>
          </table:table-cell>
          <table:table-cell table:formula="of:=([.A73]+[.$B$10])/[.$B$8]" office:value-type="float" office:value="16.8283086027468" calcext:value-type="float">
            <text:p>16.8283086027468</text:p>
          </table:table-cell>
          <table:table-cell table:formula="of:=([.A73]+[.$B$10]+[.$B$11])/[.$B$8]" office:value-type="float" office:value="18.3293470311385" calcext:value-type="float">
            <text:p>18.3293470311385</text:p>
          </table:table-cell>
          <table:table-cell table:formula="of:=([.C73]+[.B73]-[.E73]-[.D73])/2" office:value-type="float" office:value="53.6389573918402" calcext:value-type="float">
            <text:p>53.6389573918402</text:p>
          </table:table-cell>
          <table:table-cell table:formula="of:=([.C73]+[.B73])/2" office:value-type="float" office:value="71.2177852087828" calcext:value-type="float">
            <text:p>71.2177852087828</text:p>
          </table:table-cell>
          <table:table-cell table:formula="of:=([.D73]+[.E73])/2" office:value-type="float" office:value="17.5788278169426" calcext:value-type="float">
            <text:p>17.5788278169426</text:p>
          </table:table-cell>
          <table:table-cell table:style-name="ce8" table:formula="of:=[.G73]-[.H73]" office:value-type="float" office:value="53.6389573918401" calcext:value-type="float">
            <text:p>53.6389573918</text:p>
          </table:table-cell>
          <table:table-cell table:formula="of:=MOD([.I73];40)" office:value-type="float" office:value="13.6389573918401" calcext:value-type="float">
            <text:p>13.6389573918401</text:p>
          </table:table-cell>
          <table:table-cell table:formula="of:=40-[.J73]" office:value-type="float" office:value="26.3610426081599" calcext:value-type="float">
            <text:p>26.361042608159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[.A74]+[.$B$10])/[.$D$34]" office:value-type="float" office:value="69.5285588043999" calcext:value-type="float">
            <text:p>69.53</text:p>
          </table:table-cell>
          <table:table-cell table:formula="of:=([.A74]+[.$B$10]+[.$B$11])/[.$D$34]" office:value-type="float" office:value="75.6097738601783" calcext:value-type="float">
            <text:p>75.6097738601783</text:p>
          </table:table-cell>
          <table:table-cell table:formula="of:=([.A74]+[.$B$10])/[.$B$8]" office:value-type="float" office:value="17.1618726979449" calcext:value-type="float">
            <text:p>17.1618726979449</text:p>
          </table:table-cell>
          <table:table-cell table:formula="of:=([.A74]+[.$B$10]+[.$B$11])/[.$B$8]" office:value-type="float" office:value="18.6629111263366" calcext:value-type="float">
            <text:p>18.6629111263366</text:p>
          </table:table-cell>
          <table:table-cell table:formula="of:=([.C74]+[.B74]-[.E74]-[.D74])/2" office:value-type="float" office:value="54.6567744201484" calcext:value-type="float">
            <text:p>54.6567744201484</text:p>
          </table:table-cell>
          <table:table-cell table:formula="of:=([.C74]+[.B74])/2" office:value-type="float" office:value="72.5691663322891" calcext:value-type="float">
            <text:p>72.5691663322891</text:p>
          </table:table-cell>
          <table:table-cell table:formula="of:=([.D74]+[.E74])/2" office:value-type="float" office:value="17.9123919121408" calcext:value-type="float">
            <text:p>17.9123919121408</text:p>
          </table:table-cell>
          <table:table-cell table:style-name="ce8" table:formula="of:=[.G74]-[.H74]" office:value-type="float" office:value="54.6567744201483" calcext:value-type="float">
            <text:p>54.6567744201</text:p>
          </table:table-cell>
          <table:table-cell table:formula="of:=MOD([.I74];40)" office:value-type="float" office:value="14.6567744201483" calcext:value-type="float">
            <text:p>14.6567744201483</text:p>
          </table:table-cell>
          <table:table-cell table:formula="of:=40-[.J74]" office:value-type="float" office:value="25.3432255798517" calcext:value-type="float">
            <text:p>25.34322557985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[.A75]+[.$B$10])/[.$D$34]" office:value-type="float" office:value="70.8799399279062" calcext:value-type="float">
            <text:p>70.88</text:p>
          </table:table-cell>
          <table:table-cell table:formula="of:=([.A75]+[.$B$10]+[.$B$11])/[.$D$34]" office:value-type="float" office:value="76.9611549836846" calcext:value-type="float">
            <text:p>76.9611549836846</text:p>
          </table:table-cell>
          <table:table-cell table:formula="of:=([.A75]+[.$B$10])/[.$B$8]" office:value-type="float" office:value="17.4954367931431" calcext:value-type="float">
            <text:p>17.4954367931431</text:p>
          </table:table-cell>
          <table:table-cell table:formula="of:=([.A75]+[.$B$10]+[.$B$11])/[.$B$8]" office:value-type="float" office:value="18.9964752215348" calcext:value-type="float">
            <text:p>18.9964752215348</text:p>
          </table:table-cell>
          <table:table-cell table:formula="of:=([.C75]+[.B75]-[.E75]-[.D75])/2" office:value-type="float" office:value="55.6745914484565" calcext:value-type="float">
            <text:p>55.6745914484565</text:p>
          </table:table-cell>
          <table:table-cell table:formula="of:=([.C75]+[.B75])/2" office:value-type="float" office:value="73.9205474557954" calcext:value-type="float">
            <text:p>73.9205474557954</text:p>
          </table:table-cell>
          <table:table-cell table:formula="of:=([.D75]+[.E75])/2" office:value-type="float" office:value="18.2459560073389" calcext:value-type="float">
            <text:p>18.2459560073389</text:p>
          </table:table-cell>
          <table:table-cell table:style-name="ce8" table:formula="of:=[.G75]-[.H75]" office:value-type="float" office:value="55.6745914484565" calcext:value-type="float">
            <text:p>55.6745914485</text:p>
          </table:table-cell>
          <table:table-cell table:formula="of:=MOD([.I75];40)" office:value-type="float" office:value="15.6745914484565" calcext:value-type="float">
            <text:p>15.6745914484565</text:p>
          </table:table-cell>
          <table:table-cell table:formula="of:=40-[.J75]" office:value-type="float" office:value="24.3254085515435" calcext:value-type="float">
            <text:p>24.32540855154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[.A76]+[.$B$10])/[.$D$34]" office:value-type="float" office:value="72.2313210514125" calcext:value-type="float">
            <text:p>72.23</text:p>
          </table:table-cell>
          <table:table-cell table:formula="of:=([.A76]+[.$B$10]+[.$B$11])/[.$D$34]" office:value-type="float" office:value="78.312536107191" calcext:value-type="float">
            <text:p>78.312536107191</text:p>
          </table:table-cell>
          <table:table-cell table:formula="of:=([.A76]+[.$B$10])/[.$B$8]" office:value-type="float" office:value="17.8290008883412" calcext:value-type="float">
            <text:p>17.8290008883412</text:p>
          </table:table-cell>
          <table:table-cell table:formula="of:=([.A76]+[.$B$10]+[.$B$11])/[.$B$8]" office:value-type="float" office:value="19.3300393167329" calcext:value-type="float">
            <text:p>19.3300393167329</text:p>
          </table:table-cell>
          <table:table-cell table:formula="of:=([.C76]+[.B76]-[.E76]-[.D76])/2" office:value-type="float" office:value="56.6924084767646" calcext:value-type="float">
            <text:p>56.6924084767646</text:p>
          </table:table-cell>
          <table:table-cell table:formula="of:=([.C76]+[.B76])/2" office:value-type="float" office:value="75.2719285793017" calcext:value-type="float">
            <text:p>75.2719285793017</text:p>
          </table:table-cell>
          <table:table-cell table:formula="of:=([.D76]+[.E76])/2" office:value-type="float" office:value="18.5795201025371" calcext:value-type="float">
            <text:p>18.5795201025371</text:p>
          </table:table-cell>
          <table:table-cell table:style-name="ce8" table:formula="of:=[.G76]-[.H76]" office:value-type="float" office:value="56.6924084767646" calcext:value-type="float">
            <text:p>56.6924084768</text:p>
          </table:table-cell>
          <table:table-cell table:formula="of:=MOD([.I76];40)" office:value-type="float" office:value="16.6924084767646" calcext:value-type="float">
            <text:p>16.6924084767646</text:p>
          </table:table-cell>
          <table:table-cell table:formula="of:=40-[.J76]" office:value-type="float" office:value="23.3075915232354" calcext:value-type="float">
            <text:p>23.307591523235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[.A77]+[.$B$10])/[.$D$34]" office:value-type="float" office:value="73.5827021749188" calcext:value-type="float">
            <text:p>73.58</text:p>
          </table:table-cell>
          <table:table-cell table:formula="of:=([.A77]+[.$B$10]+[.$B$11])/[.$D$34]" office:value-type="float" office:value="79.6639172306973" calcext:value-type="float">
            <text:p>79.6639172306973</text:p>
          </table:table-cell>
          <table:table-cell table:formula="of:=([.A77]+[.$B$10])/[.$B$8]" office:value-type="float" office:value="18.1625649835394" calcext:value-type="float">
            <text:p>18.1625649835394</text:p>
          </table:table-cell>
          <table:table-cell table:formula="of:=([.A77]+[.$B$10]+[.$B$11])/[.$B$8]" office:value-type="float" office:value="19.6636034119311" calcext:value-type="float">
            <text:p>19.6636034119311</text:p>
          </table:table-cell>
          <table:table-cell table:formula="of:=([.C77]+[.B77]-[.E77]-[.D77])/2" office:value-type="float" office:value="57.7102255050728" calcext:value-type="float">
            <text:p>57.7102255050728</text:p>
          </table:table-cell>
          <table:table-cell table:formula="of:=([.C77]+[.B77])/2" office:value-type="float" office:value="76.623309702808" calcext:value-type="float">
            <text:p>76.623309702808</text:p>
          </table:table-cell>
          <table:table-cell table:formula="of:=([.D77]+[.E77])/2" office:value-type="float" office:value="18.9130841977352" calcext:value-type="float">
            <text:p>18.9130841977352</text:p>
          </table:table-cell>
          <table:table-cell table:style-name="ce8" table:formula="of:=[.G77]-[.H77]" office:value-type="float" office:value="57.7102255050728" calcext:value-type="float">
            <text:p>57.7102255051</text:p>
          </table:table-cell>
          <table:table-cell table:formula="of:=MOD([.I77];40)" office:value-type="float" office:value="17.7102255050728" calcext:value-type="float">
            <text:p>17.7102255050728</text:p>
          </table:table-cell>
          <table:table-cell table:formula="of:=40-[.J77]" office:value-type="float" office:value="22.2897744949272" calcext:value-type="float">
            <text:p>22.289774494927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[.A78]+[.$B$10])/[.$D$34]" office:value-type="float" office:value="74.9340832984251" calcext:value-type="float">
            <text:p>74.93</text:p>
          </table:table-cell>
          <table:table-cell table:formula="of:=([.A78]+[.$B$10]+[.$B$11])/[.$D$34]" office:value-type="float" office:value="81.0152983542036" calcext:value-type="float">
            <text:p>81.0152983542036</text:p>
          </table:table-cell>
          <table:table-cell table:formula="of:=([.A78]+[.$B$10])/[.$B$8]" office:value-type="float" office:value="18.4961290787375" calcext:value-type="float">
            <text:p>18.4961290787375</text:p>
          </table:table-cell>
          <table:table-cell table:formula="of:=([.A78]+[.$B$10]+[.$B$11])/[.$B$8]" office:value-type="float" office:value="19.9971675071292" calcext:value-type="float">
            <text:p>19.9971675071292</text:p>
          </table:table-cell>
          <table:table-cell table:formula="of:=([.C78]+[.B78]-[.E78]-[.D78])/2" office:value-type="float" office:value="58.728042533381" calcext:value-type="float">
            <text:p>58.728042533381</text:p>
          </table:table-cell>
          <table:table-cell table:formula="of:=([.C78]+[.B78])/2" office:value-type="float" office:value="77.9746908263143" calcext:value-type="float">
            <text:p>77.9746908263143</text:p>
          </table:table-cell>
          <table:table-cell table:formula="of:=([.D78]+[.E78])/2" office:value-type="float" office:value="19.2466482929334" calcext:value-type="float">
            <text:p>19.2466482929334</text:p>
          </table:table-cell>
          <table:table-cell table:style-name="ce8" table:formula="of:=[.G78]-[.H78]" office:value-type="float" office:value="58.728042533381" calcext:value-type="float">
            <text:p>58.7280425334</text:p>
          </table:table-cell>
          <table:table-cell table:formula="of:=MOD([.I78];40)" office:value-type="float" office:value="18.728042533381" calcext:value-type="float">
            <text:p>18.728042533381</text:p>
          </table:table-cell>
          <table:table-cell table:formula="of:=40-[.J78]" office:value-type="float" office:value="21.271957466619" calcext:value-type="float">
            <text:p>21.27195746661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[.A79]+[.$B$10])/[.$D$34]" office:value-type="float" office:value="76.2854644219314" calcext:value-type="float">
            <text:p>76.29</text:p>
          </table:table-cell>
          <table:table-cell table:formula="of:=([.A79]+[.$B$10]+[.$B$11])/[.$D$34]" office:value-type="float" office:value="82.3666794777099" calcext:value-type="float">
            <text:p>82.3666794777099</text:p>
          </table:table-cell>
          <table:table-cell table:formula="of:=([.A79]+[.$B$10])/[.$B$8]" office:value-type="float" office:value="18.8296931739357" calcext:value-type="float">
            <text:p>18.8296931739357</text:p>
          </table:table-cell>
          <table:table-cell table:formula="of:=([.A79]+[.$B$10]+[.$B$11])/[.$B$8]" office:value-type="float" office:value="20.3307316023274" calcext:value-type="float">
            <text:p>20.3307316023274</text:p>
          </table:table-cell>
          <table:table-cell table:formula="of:=([.C79]+[.B79]-[.E79]-[.D79])/2" office:value-type="float" office:value="59.7458595616891" calcext:value-type="float">
            <text:p>59.7458595616891</text:p>
          </table:table-cell>
          <table:table-cell table:formula="of:=([.C79]+[.B79])/2" office:value-type="float" office:value="79.3260719498206" calcext:value-type="float">
            <text:p>79.3260719498206</text:p>
          </table:table-cell>
          <table:table-cell table:formula="of:=([.D79]+[.E79])/2" office:value-type="float" office:value="19.5802123881315" calcext:value-type="float">
            <text:p>19.5802123881315</text:p>
          </table:table-cell>
          <table:table-cell table:style-name="ce8" table:formula="of:=[.G79]-[.H79]" office:value-type="float" office:value="59.7458595616891" calcext:value-type="float">
            <text:p>59.7458595617</text:p>
          </table:table-cell>
          <table:table-cell table:formula="of:=MOD([.I79];40)" office:value-type="float" office:value="19.7458595616891" calcext:value-type="float">
            <text:p>19.7458595616891</text:p>
          </table:table-cell>
          <table:table-cell table:formula="of:=40-[.J79]" office:value-type="float" office:value="20.2541404383109" calcext:value-type="float">
            <text:p>20.254140438310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[.A80]+[.$B$10])/[.$D$34]" office:value-type="float" office:value="77.6368455454378" calcext:value-type="float">
            <text:p>77.64</text:p>
          </table:table-cell>
          <table:table-cell table:formula="of:=([.A80]+[.$B$10]+[.$B$11])/[.$D$34]" office:value-type="float" office:value="83.7180606012162" calcext:value-type="float">
            <text:p>83.7180606012162</text:p>
          </table:table-cell>
          <table:table-cell table:formula="of:=([.A80]+[.$B$10])/[.$B$8]" office:value-type="float" office:value="19.1632572691338" calcext:value-type="float">
            <text:p>19.1632572691338</text:p>
          </table:table-cell>
          <table:table-cell table:formula="of:=([.A80]+[.$B$10]+[.$B$11])/[.$B$8]" office:value-type="float" office:value="20.6642956975255" calcext:value-type="float">
            <text:p>20.6642956975255</text:p>
          </table:table-cell>
          <table:table-cell table:formula="of:=([.C80]+[.B80]-[.E80]-[.D80])/2" office:value-type="float" office:value="60.7636765899973" calcext:value-type="float">
            <text:p>60.7636765899973</text:p>
          </table:table-cell>
          <table:table-cell table:formula="of:=([.C80]+[.B80])/2" office:value-type="float" office:value="80.677453073327" calcext:value-type="float">
            <text:p>80.677453073327</text:p>
          </table:table-cell>
          <table:table-cell table:formula="of:=([.D80]+[.E80])/2" office:value-type="float" office:value="19.9137764833297" calcext:value-type="float">
            <text:p>19.9137764833297</text:p>
          </table:table-cell>
          <table:table-cell table:style-name="ce8" table:formula="of:=[.G80]-[.H80]" office:value-type="float" office:value="60.7636765899973" calcext:value-type="float">
            <text:p>60.7636765900</text:p>
          </table:table-cell>
          <table:table-cell table:formula="of:=MOD([.I80];40)" office:value-type="float" office:value="20.7636765899973" calcext:value-type="float">
            <text:p>20.7636765899973</text:p>
          </table:table-cell>
          <table:table-cell table:formula="of:=40-[.J80]" office:value-type="float" office:value="19.2363234100027" calcext:value-type="float">
            <text:p>19.236323410002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[.A81]+[.$B$10])/[.$D$34]" office:value-type="float" office:value="78.9882266689441" calcext:value-type="float">
            <text:p>78.99</text:p>
          </table:table-cell>
          <table:table-cell table:formula="of:=([.A81]+[.$B$10]+[.$B$11])/[.$D$34]" office:value-type="float" office:value="85.0694417247225" calcext:value-type="float">
            <text:p>85.0694417247225</text:p>
          </table:table-cell>
          <table:table-cell table:formula="of:=([.A81]+[.$B$10])/[.$B$8]" office:value-type="float" office:value="19.496821364332" calcext:value-type="float">
            <text:p>19.496821364332</text:p>
          </table:table-cell>
          <table:table-cell table:formula="of:=([.A81]+[.$B$10]+[.$B$11])/[.$B$8]" office:value-type="float" office:value="20.9978597927237" calcext:value-type="float">
            <text:p>20.9978597927237</text:p>
          </table:table-cell>
          <table:table-cell table:formula="of:=([.C81]+[.B81]-[.E81]-[.D81])/2" office:value-type="float" office:value="61.7814936183055" calcext:value-type="float">
            <text:p>61.7814936183055</text:p>
          </table:table-cell>
          <table:table-cell table:formula="of:=([.C81]+[.B81])/2" office:value-type="float" office:value="82.0288341968333" calcext:value-type="float">
            <text:p>82.0288341968333</text:p>
          </table:table-cell>
          <table:table-cell table:formula="of:=([.D81]+[.E81])/2" office:value-type="float" office:value="20.2473405785278" calcext:value-type="float">
            <text:p>20.2473405785278</text:p>
          </table:table-cell>
          <table:table-cell table:style-name="ce8" table:formula="of:=[.G81]-[.H81]" office:value-type="float" office:value="61.7814936183054" calcext:value-type="float">
            <text:p>61.7814936183</text:p>
          </table:table-cell>
          <table:table-cell table:formula="of:=MOD([.I81];40)" office:value-type="float" office:value="21.7814936183054" calcext:value-type="float">
            <text:p>21.7814936183054</text:p>
          </table:table-cell>
          <table:table-cell table:formula="of:=40-[.J81]" office:value-type="float" office:value="18.2185063816946" calcext:value-type="float">
            <text:p>18.218506381694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[.A82]+[.$B$10])/[.$D$34]" office:value-type="float" office:value="80.3396077924504" calcext:value-type="float">
            <text:p>80.34</text:p>
          </table:table-cell>
          <table:table-cell table:formula="of:=([.A82]+[.$B$10]+[.$B$11])/[.$D$34]" office:value-type="float" office:value="86.4208228482288" calcext:value-type="float">
            <text:p>86.4208228482288</text:p>
          </table:table-cell>
          <table:table-cell table:formula="of:=([.A82]+[.$B$10])/[.$B$8]" office:value-type="float" office:value="19.8303854595301" calcext:value-type="float">
            <text:p>19.8303854595301</text:p>
          </table:table-cell>
          <table:table-cell table:formula="of:=([.A82]+[.$B$10]+[.$B$11])/[.$B$8]" office:value-type="float" office:value="21.3314238879218" calcext:value-type="float">
            <text:p>21.3314238879218</text:p>
          </table:table-cell>
          <table:table-cell table:formula="of:=([.C82]+[.B82]-[.E82]-[.D82])/2" office:value-type="float" office:value="62.7993106466136" calcext:value-type="float">
            <text:p>62.7993106466136</text:p>
          </table:table-cell>
          <table:table-cell table:formula="of:=([.C82]+[.B82])/2" office:value-type="float" office:value="83.3802153203396" calcext:value-type="float">
            <text:p>83.3802153203396</text:p>
          </table:table-cell>
          <table:table-cell table:formula="of:=([.D82]+[.E82])/2" office:value-type="float" office:value="20.580904673726" calcext:value-type="float">
            <text:p>20.580904673726</text:p>
          </table:table-cell>
          <table:table-cell table:style-name="ce8" table:formula="of:=[.G82]-[.H82]" office:value-type="float" office:value="62.7993106466136" calcext:value-type="float">
            <text:p>62.7993106466</text:p>
          </table:table-cell>
          <table:table-cell table:formula="of:=MOD([.I82];40)" office:value-type="float" office:value="22.7993106466136" calcext:value-type="float">
            <text:p>22.7993106466136</text:p>
          </table:table-cell>
          <table:table-cell table:formula="of:=40-[.J82]" office:value-type="float" office:value="17.2006893533864" calcext:value-type="float">
            <text:p>17.200689353386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[.A83]+[.$B$10])/[.$D$34]" office:value-type="float" office:value="81.6909889159567" calcext:value-type="float">
            <text:p>81.69</text:p>
          </table:table-cell>
          <table:table-cell table:formula="of:=([.A83]+[.$B$10]+[.$B$11])/[.$D$34]" office:value-type="float" office:value="87.7722039717352" calcext:value-type="float">
            <text:p>87.7722039717352</text:p>
          </table:table-cell>
          <table:table-cell table:formula="of:=([.A83]+[.$B$10])/[.$B$8]" office:value-type="float" office:value="20.1639495547283" calcext:value-type="float">
            <text:p>20.1639495547283</text:p>
          </table:table-cell>
          <table:table-cell table:formula="of:=([.A83]+[.$B$10]+[.$B$11])/[.$B$8]" office:value-type="float" office:value="21.66498798312" calcext:value-type="float">
            <text:p>21.66498798312</text:p>
          </table:table-cell>
          <table:table-cell table:formula="of:=([.C83]+[.B83]-[.E83]-[.D83])/2" office:value-type="float" office:value="63.8171276749218" calcext:value-type="float">
            <text:p>63.8171276749218</text:p>
          </table:table-cell>
          <table:table-cell table:formula="of:=([.C83]+[.B83])/2" office:value-type="float" office:value="84.7315964438459" calcext:value-type="float">
            <text:p>84.7315964438459</text:p>
          </table:table-cell>
          <table:table-cell table:formula="of:=([.D83]+[.E83])/2" office:value-type="float" office:value="20.9144687689241" calcext:value-type="float">
            <text:p>20.9144687689241</text:p>
          </table:table-cell>
          <table:table-cell table:style-name="ce8" table:formula="of:=[.G83]-[.H83]" office:value-type="float" office:value="63.8171276749218" calcext:value-type="float">
            <text:p>63.8171276749</text:p>
          </table:table-cell>
          <table:table-cell table:formula="of:=MOD([.I83];40)" office:value-type="float" office:value="23.8171276749218" calcext:value-type="float">
            <text:p>23.8171276749218</text:p>
          </table:table-cell>
          <table:table-cell table:formula="of:=40-[.J83]" office:value-type="float" office:value="16.1828723250782" calcext:value-type="float">
            <text:p>16.182872325078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[.A84]+[.$B$10])/[.$D$34]" office:value-type="float" office:value="83.042370039463" calcext:value-type="float">
            <text:p>83.04</text:p>
          </table:table-cell>
          <table:table-cell table:formula="of:=([.A84]+[.$B$10]+[.$B$11])/[.$D$34]" office:value-type="float" office:value="89.1235850952415" calcext:value-type="float">
            <text:p>89.1235850952415</text:p>
          </table:table-cell>
          <table:table-cell table:formula="of:=([.A84]+[.$B$10])/[.$B$8]" office:value-type="float" office:value="20.4975136499264" calcext:value-type="float">
            <text:p>20.4975136499264</text:p>
          </table:table-cell>
          <table:table-cell table:formula="of:=([.A84]+[.$B$10]+[.$B$11])/[.$B$8]" office:value-type="float" office:value="21.9985520783181" calcext:value-type="float">
            <text:p>21.9985520783181</text:p>
          </table:table-cell>
          <table:table-cell table:formula="of:=([.C84]+[.B84]-[.E84]-[.D84])/2" office:value-type="float" office:value="64.8349447032299" calcext:value-type="float">
            <text:p>64.8349447032299</text:p>
          </table:table-cell>
          <table:table-cell table:formula="of:=([.C84]+[.B84])/2" office:value-type="float" office:value="86.0829775673522" calcext:value-type="float">
            <text:p>86.0829775673522</text:p>
          </table:table-cell>
          <table:table-cell table:formula="of:=([.D84]+[.E84])/2" office:value-type="float" office:value="21.2480328641223" calcext:value-type="float">
            <text:p>21.2480328641223</text:p>
          </table:table-cell>
          <table:table-cell table:style-name="ce8" table:formula="of:=[.G84]-[.H84]" office:value-type="float" office:value="64.8349447032299" calcext:value-type="float">
            <text:p>64.8349447032</text:p>
          </table:table-cell>
          <table:table-cell table:formula="of:=MOD([.I84];40)" office:value-type="float" office:value="24.8349447032299" calcext:value-type="float">
            <text:p>24.8349447032299</text:p>
          </table:table-cell>
          <table:table-cell table:formula="of:=40-[.J84]" office:value-type="float" office:value="15.1650552967701" calcext:value-type="float">
            <text:p>15.165055296770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[.A85]+[.$B$10])/[.$D$34]" office:value-type="float" office:value="84.3937511629693" calcext:value-type="float">
            <text:p>84.39</text:p>
          </table:table-cell>
          <table:table-cell table:formula="of:=([.A85]+[.$B$10]+[.$B$11])/[.$D$34]" office:value-type="float" office:value="90.4749662187478" calcext:value-type="float">
            <text:p>90.4749662187478</text:p>
          </table:table-cell>
          <table:table-cell table:formula="of:=([.A85]+[.$B$10])/[.$B$8]" office:value-type="float" office:value="20.8310777451246" calcext:value-type="float">
            <text:p>20.8310777451246</text:p>
          </table:table-cell>
          <table:table-cell table:formula="of:=([.A85]+[.$B$10]+[.$B$11])/[.$B$8]" office:value-type="float" office:value="22.3321161735163" calcext:value-type="float">
            <text:p>22.3321161735163</text:p>
          </table:table-cell>
          <table:table-cell table:formula="of:=([.C85]+[.B85]-[.E85]-[.D85])/2" office:value-type="float" office:value="65.8527617315381" calcext:value-type="float">
            <text:p>65.8527617315381</text:p>
          </table:table-cell>
          <table:table-cell table:formula="of:=([.C85]+[.B85])/2" office:value-type="float" office:value="87.4343586908586" calcext:value-type="float">
            <text:p>87.4343586908586</text:p>
          </table:table-cell>
          <table:table-cell table:formula="of:=([.D85]+[.E85])/2" office:value-type="float" office:value="21.5815969593204" calcext:value-type="float">
            <text:p>21.5815969593204</text:p>
          </table:table-cell>
          <table:table-cell table:style-name="ce8" table:formula="of:=[.G85]-[.H85]" office:value-type="float" office:value="65.8527617315381" calcext:value-type="float">
            <text:p>65.8527617315</text:p>
          </table:table-cell>
          <table:table-cell table:formula="of:=MOD([.I85];40)" office:value-type="float" office:value="25.8527617315381" calcext:value-type="float">
            <text:p>25.8527617315381</text:p>
          </table:table-cell>
          <table:table-cell table:formula="of:=40-[.J85]" office:value-type="float" office:value="14.1472382684619" calcext:value-type="float">
            <text:p>14.147238268461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[.A86]+[.$B$10])/[.$D$34]" office:value-type="float" office:value="85.7451322864756" calcext:value-type="float">
            <text:p>85.75</text:p>
          </table:table-cell>
          <table:table-cell table:formula="of:=([.A86]+[.$B$10]+[.$B$11])/[.$D$34]" office:value-type="float" office:value="91.8263473422541" calcext:value-type="float">
            <text:p>91.8263473422541</text:p>
          </table:table-cell>
          <table:table-cell table:formula="of:=([.A86]+[.$B$10])/[.$B$8]" office:value-type="float" office:value="21.1646418403227" calcext:value-type="float">
            <text:p>21.1646418403227</text:p>
          </table:table-cell>
          <table:table-cell table:formula="of:=([.A86]+[.$B$10]+[.$B$11])/[.$B$8]" office:value-type="float" office:value="22.6656802687144" calcext:value-type="float">
            <text:p>22.6656802687144</text:p>
          </table:table-cell>
          <table:table-cell table:formula="of:=([.C86]+[.B86]-[.E86]-[.D86])/2" office:value-type="float" office:value="66.8705787598463" calcext:value-type="float">
            <text:p>66.8705787598463</text:p>
          </table:table-cell>
          <table:table-cell table:formula="of:=([.C86]+[.B86])/2" office:value-type="float" office:value="88.7857398143649" calcext:value-type="float">
            <text:p>88.7857398143649</text:p>
          </table:table-cell>
          <table:table-cell table:formula="of:=([.D86]+[.E86])/2" office:value-type="float" office:value="21.9151610545186" calcext:value-type="float">
            <text:p>21.9151610545186</text:p>
          </table:table-cell>
          <table:table-cell table:style-name="ce8" table:formula="of:=[.G86]-[.H86]" office:value-type="float" office:value="66.8705787598462" calcext:value-type="float">
            <text:p>66.8705787598</text:p>
          </table:table-cell>
          <table:table-cell table:formula="of:=MOD([.I86];40)" office:value-type="float" office:value="26.8705787598462" calcext:value-type="float">
            <text:p>26.8705787598462</text:p>
          </table:table-cell>
          <table:table-cell table:formula="of:=40-[.J86]" office:value-type="float" office:value="13.1294212401538" calcext:value-type="float">
            <text:p>13.12942124015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[.A87]+[.$B$10])/[.$D$34]" office:value-type="float" office:value="87.0965134099819" calcext:value-type="float">
            <text:p>87.10</text:p>
          </table:table-cell>
          <table:table-cell table:formula="of:=([.A87]+[.$B$10]+[.$B$11])/[.$D$34]" office:value-type="float" office:value="93.1777284657604" calcext:value-type="float">
            <text:p>93.1777284657604</text:p>
          </table:table-cell>
          <table:table-cell table:formula="of:=([.A87]+[.$B$10])/[.$B$8]" office:value-type="float" office:value="21.4982059355209" calcext:value-type="float">
            <text:p>21.4982059355209</text:p>
          </table:table-cell>
          <table:table-cell table:formula="of:=([.A87]+[.$B$10]+[.$B$11])/[.$B$8]" office:value-type="float" office:value="22.9992443639126" calcext:value-type="float">
            <text:p>22.9992443639126</text:p>
          </table:table-cell>
          <table:table-cell table:formula="of:=([.C87]+[.B87]-[.E87]-[.D87])/2" office:value-type="float" office:value="67.8883957881544" calcext:value-type="float">
            <text:p>67.8883957881544</text:p>
          </table:table-cell>
          <table:table-cell table:formula="of:=([.C87]+[.B87])/2" office:value-type="float" office:value="90.1371209378712" calcext:value-type="float">
            <text:p>90.1371209378712</text:p>
          </table:table-cell>
          <table:table-cell table:formula="of:=([.D87]+[.E87])/2" office:value-type="float" office:value="22.2487251497167" calcext:value-type="float">
            <text:p>22.2487251497167</text:p>
          </table:table-cell>
          <table:table-cell table:style-name="ce8" table:formula="of:=[.G87]-[.H87]" office:value-type="float" office:value="67.8883957881544" calcext:value-type="float">
            <text:p>67.8883957882</text:p>
          </table:table-cell>
          <table:table-cell table:formula="of:=MOD([.I87];40)" office:value-type="float" office:value="27.8883957881544" calcext:value-type="float">
            <text:p>27.8883957881544</text:p>
          </table:table-cell>
          <table:table-cell table:formula="of:=40-[.J87]" office:value-type="float" office:value="12.1116042118456" calcext:value-type="float">
            <text:p>12.111604211845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[.A88]+[.$B$10])/[.$D$34]" office:value-type="float" office:value="88.4478945334883" calcext:value-type="float">
            <text:p>88.45</text:p>
          </table:table-cell>
          <table:table-cell table:formula="of:=([.A88]+[.$B$10]+[.$B$11])/[.$D$34]" office:value-type="float" office:value="94.5291095892667" calcext:value-type="float">
            <text:p>94.5291095892667</text:p>
          </table:table-cell>
          <table:table-cell table:formula="of:=([.A88]+[.$B$10])/[.$B$8]" office:value-type="float" office:value="21.8317700307191" calcext:value-type="float">
            <text:p>21.8317700307191</text:p>
          </table:table-cell>
          <table:table-cell table:formula="of:=([.A88]+[.$B$10]+[.$B$11])/[.$B$8]" office:value-type="float" office:value="23.3328084591107" calcext:value-type="float">
            <text:p>23.3328084591107</text:p>
          </table:table-cell>
          <table:table-cell table:formula="of:=([.C88]+[.B88]-[.E88]-[.D88])/2" office:value-type="float" office:value="68.9062128164626" calcext:value-type="float">
            <text:p>68.9062128164626</text:p>
          </table:table-cell>
          <table:table-cell table:formula="of:=([.C88]+[.B88])/2" office:value-type="float" office:value="91.4885020613775" calcext:value-type="float">
            <text:p>91.4885020613775</text:p>
          </table:table-cell>
          <table:table-cell table:formula="of:=([.D88]+[.E88])/2" office:value-type="float" office:value="22.5822892449149" calcext:value-type="float">
            <text:p>22.5822892449149</text:p>
          </table:table-cell>
          <table:table-cell table:style-name="ce8" table:formula="of:=[.G88]-[.H88]" office:value-type="float" office:value="68.9062128164626" calcext:value-type="float">
            <text:p>68.9062128165</text:p>
          </table:table-cell>
          <table:table-cell table:formula="of:=MOD([.I88];40)" office:value-type="float" office:value="28.9062128164626" calcext:value-type="float">
            <text:p>28.9062128164626</text:p>
          </table:table-cell>
          <table:table-cell table:formula="of:=40-[.J88]" office:value-type="float" office:value="11.0937871835374" calcext:value-type="float">
            <text:p>11.093787183537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spread TOF neutron</text:p>
          </table:table-cell>
          <table:table-cell table:style-name="ce1" office:value-type="string" calcext:value-type="string">
            <text:p>spread TOF gamma</text:p>
          </table:table-cell>
          <table:table-cell table:number-columns-repeated="9"/>
        </table:table-row>
        <table:table-row table:style-name="ro1">
          <table:table-cell table:formula="of:=[.C48]-[.B48]" office:value-type="float" office:value="6.08121505577843" calcext:value-type="float">
            <text:p>6.08121505577843</text:p>
          </table:table-cell>
          <table:table-cell table:style-name="Default" table:formula="of:=[.E48]-[.D48]" office:value-type="float" office:value="1.50103842839168" calcext:value-type="float">
            <text:p>1.50103842839168</text:p>
          </table:table-cell>
          <table:table-cell table:number-columns-repeated="9"/>
        </table:table-row>
        <table:table-row table:style-name="ro1" table:number-rows-repeated="104848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6:55:10.7797009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03:42:49.265400310</meta:creation-date>
    <meta:generator>LibreOffice/24.2.7.2$Linux_X86_64 LibreOffice_project/420$Build-2</meta:generator>
    <dc:date>2025-11-19T17:00:56.323599504</dc:date>
    <meta:editing-duration>PT36M11S</meta:editing-duration>
    <meta:editing-cycles>3</meta:editing-cycles>
    <meta:document-statistic meta:table-count="1" meta:cell-count="67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298cm" svg:height="18.817cm" xlink:href=".." xlink:type="simple" chart:class="chart:scatter" chart:style-name="ch1">
        <chart:title svg:x="11.549cm" svg:y="0.512cm" chart:style-name="ch2">
          <text:p>TOF on distance dependance </text:p>
        </chart:title>
        <chart:legend chart:legend-position="end" svg:x="25.096cm" svg:y="8.611cm" style:legend-expansion="high" chart:style-name="ch3"/>
        <chart:plot-area chart:style-name="ch4" table:cell-range-address="Sheet1.A48:Sheet1.A88 Sheet1.G47:Sheet1.I88" chart:data-source-has-labels="row" svg:x="1.596cm" svg:y="1.667cm" svg:width="22.915cm" svg:height="15.793cm">
          <chart:coordinate-region svg:x="2.403cm" svg:y="1.866cm" svg:width="21.828cm" svg:height="14.947cm"/>
          <chart:axis chart:dimension="x" chart:name="primary-x" chart:style-name="ch5">
            <chart:title svg:x="11.038cm" svg:y="17.836cm" chart:style-name="ch6">
              <text:p>Detector face Distance (cm)</text:p>
            </chart:title>
          </chart:axis>
          <chart:axis chart:dimension="y" chart:name="primary-y" chart:style-name="ch7">
            <chart:title svg:x="0.451cm" svg:y="10.242cm" chart:style-name="ch8">
              <text:p>TOF (ns)</text:p>
            </chart:title>
            <chart:grid chart:style-name="ch9" chart:class="major"/>
          </chart:axis>
          <chart:series chart:style-name="ch10" chart:values-cell-range-address="Sheet1.G48:Sheet1.G88" chart:label-cell-address="Sheet1.G47:Sheet1.G47" chart:class="chart:scatter">
            <chart:domain table:cell-range-address="Sheet1.A48:Sheet1.A88"/>
            <chart:data-point chart:repeated="41"/>
          </chart:series>
          <chart:series chart:style-name="ch11" chart:values-cell-range-address="Sheet1.H48:Sheet1.H88" chart:label-cell-address="Sheet1.H47:Sheet1.H47" chart:class="chart:scatter">
            <chart:data-point chart:repeated="41"/>
          </chart:series>
          <chart:series chart:style-name="ch12" chart:values-cell-range-address="Sheet1.I48:Sheet1.I88" chart:label-cell-address="Sheet1.I47:Sheet1.I47" chart:class="chart:scatter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TOF Neutrons</text:p>
                <draw:g>
                  <svg:desc>Sheet1.G47:Sheet1.G47</svg:desc>
                </draw:g>
              </table:table-cell>
              <table:table-cell office:value-type="string">
                <text:p>Avg TOF Gammas</text:p>
                <draw:g>
                  <svg:desc>Sheet1.H47:Sheet1.H47</svg:desc>
                </draw:g>
              </table:table-cell>
              <table:table-cell office:value-type="string">
                <text:p>avg delta TOF</text:p>
                <draw:g>
                  <svg:desc>Sheet1.I47:Sheet1.I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48:Sheet1.A88</svg:desc>
                </draw:g>
              </table:table-cell>
              <table:table-cell office:value-type="float" office:value="37.4332571211249">
                <text:p>37.4332571211249</text:p>
                <draw:g>
                  <svg:desc>Sheet1.G48:Sheet1.G88</svg:desc>
                </draw:g>
              </table:table-cell>
              <table:table-cell office:value-type="float" office:value="9.23972543698881">
                <text:p>9.23972543698881</text:p>
                <draw:g>
                  <svg:desc>Sheet1.H48:Sheet1.H88</svg:desc>
                </draw:g>
              </table:table-cell>
              <table:table-cell office:value-type="float" office:value="28.1935316841361">
                <text:p>28.1935316841361</text:p>
                <draw:g>
                  <svg:desc>Sheet1.I48:Sheet1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38.7846382446312">
                <text:p>38.7846382446312</text:p>
              </table:table-cell>
              <table:table-cell office:value-type="float" office:value="9.57328953218696">
                <text:p>9.57328953218696</text:p>
              </table:table-cell>
              <table:table-cell office:value-type="float" office:value="29.2113487124443">
                <text:p>29.2113487124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40.1360193681375">
                <text:p>40.1360193681375</text:p>
              </table:table-cell>
              <table:table-cell office:value-type="float" office:value="9.90685362738512">
                <text:p>9.90685362738512</text:p>
              </table:table-cell>
              <table:table-cell office:value-type="float" office:value="30.2291657407524">
                <text:p>30.2291657407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41.4874004916438">
                <text:p>41.4874004916438</text:p>
              </table:table-cell>
              <table:table-cell office:value-type="float" office:value="10.2404177225833">
                <text:p>10.2404177225833</text:p>
              </table:table-cell>
              <table:table-cell office:value-type="float" office:value="31.2469827690606">
                <text:p>31.2469827690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42.8387816151502">
                <text:p>42.8387816151502</text:p>
              </table:table-cell>
              <table:table-cell office:value-type="float" office:value="10.5739818177814">
                <text:p>10.5739818177814</text:p>
              </table:table-cell>
              <table:table-cell office:value-type="float" office:value="32.2647997973687">
                <text:p>32.2647997973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44.1901627386565">
                <text:p>44.1901627386565</text:p>
              </table:table-cell>
              <table:table-cell office:value-type="float" office:value="10.9075459129796">
                <text:p>10.9075459129796</text:p>
              </table:table-cell>
              <table:table-cell office:value-type="float" office:value="33.2826168256769">
                <text:p>33.2826168256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45.5415438621628">
                <text:p>45.5415438621628</text:p>
              </table:table-cell>
              <table:table-cell office:value-type="float" office:value="11.2411100081777">
                <text:p>11.2411100081777</text:p>
              </table:table-cell>
              <table:table-cell office:value-type="float" office:value="34.3004338539851">
                <text:p>34.3004338539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46.8929249856691">
                <text:p>46.8929249856691</text:p>
              </table:table-cell>
              <table:table-cell office:value-type="float" office:value="11.5746741033759">
                <text:p>11.5746741033759</text:p>
              </table:table-cell>
              <table:table-cell office:value-type="float" office:value="35.3182508822932">
                <text:p>35.3182508822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48.2443061091754">
                <text:p>48.2443061091754</text:p>
              </table:table-cell>
              <table:table-cell office:value-type="float" office:value="11.908238198574">
                <text:p>11.908238198574</text:p>
              </table:table-cell>
              <table:table-cell office:value-type="float" office:value="36.3360679106014">
                <text:p>36.3360679106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49.5956872326817">
                <text:p>49.5956872326817</text:p>
              </table:table-cell>
              <table:table-cell office:value-type="float" office:value="12.2418022937722">
                <text:p>12.2418022937722</text:p>
              </table:table-cell>
              <table:table-cell office:value-type="float" office:value="37.3538849389095">
                <text:p>37.3538849389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50.947068356188">
                <text:p>50.947068356188</text:p>
              </table:table-cell>
              <table:table-cell office:value-type="float" office:value="12.5753663889703">
                <text:p>12.5753663889703</text:p>
              </table:table-cell>
              <table:table-cell office:value-type="float" office:value="38.3717019672177">
                <text:p>38.3717019672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52.2984494796944">
                <text:p>52.2984494796944</text:p>
              </table:table-cell>
              <table:table-cell office:value-type="float" office:value="12.9089304841685">
                <text:p>12.9089304841685</text:p>
              </table:table-cell>
              <table:table-cell office:value-type="float" office:value="39.3895189955259">
                <text:p>39.3895189955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53.6498306032007">
                <text:p>53.6498306032007</text:p>
              </table:table-cell>
              <table:table-cell office:value-type="float" office:value="13.2424945793666">
                <text:p>13.2424945793666</text:p>
              </table:table-cell>
              <table:table-cell office:value-type="float" office:value="40.407336023834">
                <text:p>40.407336023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55.001211726707">
                <text:p>55.001211726707</text:p>
              </table:table-cell>
              <table:table-cell office:value-type="float" office:value="13.5760586745648">
                <text:p>13.5760586745648</text:p>
              </table:table-cell>
              <table:table-cell office:value-type="float" office:value="41.4251530521422">
                <text:p>41.4251530521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56.3525928502133">
                <text:p>56.3525928502133</text:p>
              </table:table-cell>
              <table:table-cell office:value-type="float" office:value="13.9096227697629">
                <text:p>13.9096227697629</text:p>
              </table:table-cell>
              <table:table-cell office:value-type="float" office:value="42.4429700804504">
                <text:p>42.4429700804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57.7039739737196">
                <text:p>57.7039739737196</text:p>
              </table:table-cell>
              <table:table-cell office:value-type="float" office:value="14.2431868649611">
                <text:p>14.2431868649611</text:p>
              </table:table-cell>
              <table:table-cell office:value-type="float" office:value="43.4607871087585">
                <text:p>43.4607871087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59.0553550972259">
                <text:p>59.0553550972259</text:p>
              </table:table-cell>
              <table:table-cell office:value-type="float" office:value="14.5767509601592">
                <text:p>14.5767509601592</text:p>
              </table:table-cell>
              <table:table-cell office:value-type="float" office:value="44.4786041370667">
                <text:p>44.4786041370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60.4067362207322">
                <text:p>60.4067362207322</text:p>
              </table:table-cell>
              <table:table-cell office:value-type="float" office:value="14.9103150553574">
                <text:p>14.9103150553574</text:p>
              </table:table-cell>
              <table:table-cell office:value-type="float" office:value="45.4964211653749">
                <text:p>45.49642116537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">
                <text:p>430</text:p>
              </table:table-cell>
              <table:table-cell office:value-type="float" office:value="61.7581173442386">
                <text:p>61.7581173442386</text:p>
              </table:table-cell>
              <table:table-cell office:value-type="float" office:value="15.2438791505555">
                <text:p>15.2438791505555</text:p>
              </table:table-cell>
              <table:table-cell office:value-type="float" office:value="46.514238193683">
                <text:p>46.514238193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63.1094984677449">
                <text:p>63.1094984677449</text:p>
              </table:table-cell>
              <table:table-cell office:value-type="float" office:value="15.5774432457537">
                <text:p>15.5774432457537</text:p>
              </table:table-cell>
              <table:table-cell office:value-type="float" office:value="47.5320552219912">
                <text:p>47.5320552219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  <table:table-cell office:value-type="float" office:value="64.4608795912512">
                <text:p>64.4608795912512</text:p>
              </table:table-cell>
              <table:table-cell office:value-type="float" office:value="15.9110073409519">
                <text:p>15.9110073409519</text:p>
              </table:table-cell>
              <table:table-cell office:value-type="float" office:value="48.5498722502993">
                <text:p>48.5498722502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65.8122607147575">
                <text:p>65.8122607147575</text:p>
              </table:table-cell>
              <table:table-cell office:value-type="float" office:value="16.24457143615">
                <text:p>16.24457143615</text:p>
              </table:table-cell>
              <table:table-cell office:value-type="float" office:value="49.5676892786075">
                <text:p>49.5676892786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67.1636418382638">
                <text:p>67.1636418382638</text:p>
              </table:table-cell>
              <table:table-cell office:value-type="float" office:value="16.5781355313482">
                <text:p>16.5781355313482</text:p>
              </table:table-cell>
              <table:table-cell office:value-type="float" office:value="50.5855063069157">
                <text:p>50.58550630691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68.5150229617701">
                <text:p>68.5150229617701</text:p>
              </table:table-cell>
              <table:table-cell office:value-type="float" office:value="16.9116996265463">
                <text:p>16.9116996265463</text:p>
              </table:table-cell>
              <table:table-cell office:value-type="float" office:value="51.6033233352238">
                <text:p>51.6033233352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69.8664040852765">
                <text:p>69.8664040852765</text:p>
              </table:table-cell>
              <table:table-cell office:value-type="float" office:value="17.2452637217445">
                <text:p>17.2452637217445</text:p>
              </table:table-cell>
              <table:table-cell office:value-type="float" office:value="52.621140363532">
                <text:p>52.621140363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71.2177852087828">
                <text:p>71.2177852087828</text:p>
              </table:table-cell>
              <table:table-cell office:value-type="float" office:value="17.5788278169426">
                <text:p>17.5788278169426</text:p>
              </table:table-cell>
              <table:table-cell office:value-type="float" office:value="53.6389573918401">
                <text:p>53.63895739184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72.5691663322891">
                <text:p>72.5691663322891</text:p>
              </table:table-cell>
              <table:table-cell office:value-type="float" office:value="17.9123919121408">
                <text:p>17.9123919121408</text:p>
              </table:table-cell>
              <table:table-cell office:value-type="float" office:value="54.6567744201483">
                <text:p>54.6567744201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73.9205474557954">
                <text:p>73.9205474557954</text:p>
              </table:table-cell>
              <table:table-cell office:value-type="float" office:value="18.2459560073389">
                <text:p>18.2459560073389</text:p>
              </table:table-cell>
              <table:table-cell office:value-type="float" office:value="55.6745914484565">
                <text:p>55.6745914484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75.2719285793017">
                <text:p>75.2719285793017</text:p>
              </table:table-cell>
              <table:table-cell office:value-type="float" office:value="18.5795201025371">
                <text:p>18.5795201025371</text:p>
              </table:table-cell>
              <table:table-cell office:value-type="float" office:value="56.6924084767646">
                <text:p>56.69240847676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76.623309702808">
                <text:p>76.623309702808</text:p>
              </table:table-cell>
              <table:table-cell office:value-type="float" office:value="18.9130841977352">
                <text:p>18.9130841977352</text:p>
              </table:table-cell>
              <table:table-cell office:value-type="float" office:value="57.7102255050728">
                <text:p>57.7102255050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77.9746908263143">
                <text:p>77.9746908263143</text:p>
              </table:table-cell>
              <table:table-cell office:value-type="float" office:value="19.2466482929334">
                <text:p>19.2466482929334</text:p>
              </table:table-cell>
              <table:table-cell office:value-type="float" office:value="58.728042533381">
                <text:p>58.7280425333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79.3260719498206">
                <text:p>79.3260719498206</text:p>
              </table:table-cell>
              <table:table-cell office:value-type="float" office:value="19.5802123881315">
                <text:p>19.5802123881315</text:p>
              </table:table-cell>
              <table:table-cell office:value-type="float" office:value="59.7458595616891">
                <text:p>59.74585956168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">
                <text:p>570</text:p>
              </table:table-cell>
              <table:table-cell office:value-type="float" office:value="80.677453073327">
                <text:p>80.677453073327</text:p>
              </table:table-cell>
              <table:table-cell office:value-type="float" office:value="19.9137764833297">
                <text:p>19.9137764833297</text:p>
              </table:table-cell>
              <table:table-cell office:value-type="float" office:value="60.7636765899973">
                <text:p>60.76367658999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82.0288341968333">
                <text:p>82.0288341968333</text:p>
              </table:table-cell>
              <table:table-cell office:value-type="float" office:value="20.2473405785278">
                <text:p>20.2473405785278</text:p>
              </table:table-cell>
              <table:table-cell office:value-type="float" office:value="61.7814936183054">
                <text:p>61.7814936183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">
                <text:p>590</text:p>
              </table:table-cell>
              <table:table-cell office:value-type="float" office:value="83.3802153203396">
                <text:p>83.3802153203396</text:p>
              </table:table-cell>
              <table:table-cell office:value-type="float" office:value="20.580904673726">
                <text:p>20.580904673726</text:p>
              </table:table-cell>
              <table:table-cell office:value-type="float" office:value="62.7993106466136">
                <text:p>62.7993106466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84.7315964438459">
                <text:p>84.7315964438459</text:p>
              </table:table-cell>
              <table:table-cell office:value-type="float" office:value="20.9144687689241">
                <text:p>20.9144687689241</text:p>
              </table:table-cell>
              <table:table-cell office:value-type="float" office:value="63.8171276749218">
                <text:p>63.81712767492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86.0829775673522">
                <text:p>86.0829775673522</text:p>
              </table:table-cell>
              <table:table-cell office:value-type="float" office:value="21.2480328641223">
                <text:p>21.2480328641223</text:p>
              </table:table-cell>
              <table:table-cell office:value-type="float" office:value="64.8349447032299">
                <text:p>64.8349447032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87.4343586908586">
                <text:p>87.4343586908586</text:p>
              </table:table-cell>
              <table:table-cell office:value-type="float" office:value="21.5815969593204">
                <text:p>21.5815969593204</text:p>
              </table:table-cell>
              <table:table-cell office:value-type="float" office:value="65.8527617315381">
                <text:p>65.8527617315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">
                <text:p>630</text:p>
              </table:table-cell>
              <table:table-cell office:value-type="float" office:value="88.7857398143649">
                <text:p>88.7857398143649</text:p>
              </table:table-cell>
              <table:table-cell office:value-type="float" office:value="21.9151610545186">
                <text:p>21.9151610545186</text:p>
              </table:table-cell>
              <table:table-cell office:value-type="float" office:value="66.8705787598462">
                <text:p>66.870578759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90.1371209378712">
                <text:p>90.1371209378712</text:p>
              </table:table-cell>
              <table:table-cell office:value-type="float" office:value="22.2487251497167">
                <text:p>22.2487251497167</text:p>
              </table:table-cell>
              <table:table-cell office:value-type="float" office:value="67.8883957881544">
                <text:p>67.88839578815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0">
                <text:p>650</text:p>
              </table:table-cell>
              <table:table-cell office:value-type="float" office:value="91.4885020613775">
                <text:p>91.4885020613775</text:p>
              </table:table-cell>
              <table:table-cell office:value-type="float" office:value="22.5822892449149">
                <text:p>22.5822892449149</text:p>
              </table:table-cell>
              <table:table-cell office:value-type="float" office:value="68.9062128164626">
                <text:p>68.9062128164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